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  <manifest:file-entry manifest:full-path="media/image7.svg" manifest:media-type=""/>
  <manifest:file-entry manifest:full-path="media/image8.svg" manifest:media-type="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dia/image10.png" manifest:media-type="image/png"/>
  <manifest:file-entry manifest:full-path="media/image11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la Gothic One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01389in" svg:stroke-color="#7671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63" style:parent-style-name="Graphics">
      <style:graphic-properties draw:fill="none" fo:clip="rect(-0.00357in, 2.4215in, -0.00736in, 2.82212in)" draw:stroke="non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6667in" style:font-size-asian="0.66667in" style:font-size-complex="0.6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6667in" style:font-size-asian="0.66667in" style:font-size-complex="0.6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6667in" style:font-size-asian="0.66667in" style:font-size-complex="0.6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0">
      <style:paragraph-properties fo:line-height="0.37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1">
      <style:text-properties fo:font-variant="normal" fo:text-transform="none" fo:color="#ffe5e5" style:text-line-through-type="none" style:text-line-through-style="none" style:text-line-through-width="auto" style:text-line-through-color="font-color" style:text-position="0% 100%" fo:font-family="DM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0.37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ffe5e5" style:text-line-through-type="none" style:text-line-through-style="none" style:text-line-through-width="auto" style:text-line-through-color="font-color" style:text-position="0% 100%" fo:font-family="DM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0.37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ffe5e5" style:text-line-through-type="none" style:text-line-through-style="none" style:text-line-through-width="auto" style:text-line-through-color="font-color" style:text-position="0% 100%" fo:font-family="DM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0.37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ffe5e5" style:text-line-through-type="none" style:text-line-through-style="none" style:text-line-through-width="auto" style:text-line-through-color="font-color" style:text-position="0% 100%" fo:font-family="DM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0.37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ffe5e5" style:text-line-through-type="none" style:text-line-through-style="none" style:text-line-through-width="auto" style:text-line-through-color="font-color" style:text-position="0% 100%" fo:font-family="DM San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0.37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Segoe U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Segoe U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re Franklin" style:font-family-complex="Segoe U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re Franklin" style:font-family-complex="Segoe U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87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0.375in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 style:parent-style-name="Graphics">
      <style:graphic-properties draw:fill="none" draw:stroke="none"/>
    </style:style>
    <style:style style:family="presentation" style:name="a348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ffe5e5" style:text-line-through-type="none" style:text-line-through-style="none" style:text-line-through-width="auto" style:text-line-through-color="font-color" style:text-position="0% 100%" fo:font-family="DM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e5e5" style:text-line-through-type="none" style:text-line-through-style="none" style:text-line-through-width="auto" style:text-line-through-color="font-color" style:text-position="0% 100%" fo:font-family="DM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0.375in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7">
      <style:text-properties fo:font-variant="normal" fo:text-transform="none" fo:color="#ffe5e5" style:text-line-through-type="none" style:text-line-through-style="none" style:text-line-through-width="auto" style:text-line-through-color="font-color" style:text-position="0% 100%" fo:font-family="DM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0.375in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01389in" svg:stroke-color="#3b383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91" style:parent-style-name="Graphics">
      <style:graphic-properties draw:fill="none" fo:clip="rect(0.08777in, -0.00978in, 0.21455in, 0in)" draw:stroke="none"/>
    </style:style>
    <style:style style:family="graphic" style:name="a292" style:parent-style-name="Graphics">
      <style:graphic-properties draw:fill="none" draw:stroke="none"/>
    </style:style>
    <style:style style:family="graphic" style:name="a293" style:parent-style-name="Graphics">
      <style:graphic-properties draw:fill="none" draw:stroke="none"/>
    </style:style>
    <style:style style:family="graphic" style:name="a294" style:parent-style-name="Graphics">
      <style:graphic-properties draw:fill="none" draw:stroke="non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54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font-variant="normal" fo:text-transform="none" fo:color="#faebeb" style:text-line-through-type="none" style:text-line-through-style="none" style:text-line-through-width="auto" style:text-line-through-color="font-color" style:text-position="0% 100%" fo:font-family="Dela Gothic One" style:font-family-asian="Dela Gothic One" style:font-family-complex="Dela Gothic One" style:font-family-generic-complex="swiss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faebeb" style:text-line-through-type="none" style:text-line-through-style="none" style:text-line-through-width="auto" style:text-line-through-color="font-color" style:text-position="0% 100%" fo:font-family="Dela Gothic One" style:font-family-asian="Dela Gothic On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e5e5" style:text-line-through-type="none" style:text-line-through-style="none" style:text-line-through-width="auto" style:text-line-through-color="font-color" style:text-position="0% 100%" fo:font-family="DM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faebeb" style:text-line-through-type="none" style:text-line-through-style="none" style:text-line-through-width="auto" style:text-line-through-color="font-color" style:text-position="0% 100%" fo:font-family="Dela Gothic One" style:font-family-asian="Dela Gothic On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e5e5" style:text-line-through-type="none" style:text-line-through-style="none" style:text-line-through-width="auto" style:text-line-through-color="font-color" style:text-position="0% 100%" fo:font-family="DM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.069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412">
      <style:paragraph-properties fo:line-height="0.375in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" style:parent-style-name="Graphics">
      <style:graphic-properties draw:fill="none" draw:stroke="none"/>
    </style:style>
    <style:style style:family="text" style:name="a414">
      <style:text-properties fo:font-variant="normal" fo:text-transform="none" fo:color="#ffe5e5" style:text-line-through-type="none" style:text-line-through-style="none" style:text-line-through-width="auto" style:text-line-through-color="font-color" style:text-position="0% 100%" fo:font-family="DM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">
      <style:graphic-properties draw:decorative="true" style:protect="position size"/>
    </style:style>
    <style:style style:family="paragraph" style:name="a415">
      <style:paragraph-properties fo:line-height="0.375in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e5e5" style:text-line-through-type="none" style:text-line-through-style="none" style:text-line-through-width="auto" style:text-line-through-color="font-color" style:text-position="0% 100%" fo:font-family="DM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806in" style:font-size-asian="0.36806in" style:font-size-complex="0.3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e5e5" style:text-line-through-type="none" style:text-line-through-style="none" style:text-line-through-width="auto" style:text-line-through-color="font-color" style:text-position="0% 100%" fo:font-family="DM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0.3680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125in" svg:stroke-color="#ffffff" svg:stroke-opacity="100%" draw:auto-grow-width="false" draw:auto-grow-height="false" draw:decorative="true"/>
      <style:paragraph-properties style:font-independent-line-spacing="true" style:writing-mode="lr-tb"/>
    </style:style>
    <style:style style:family="text" style:name="a203">
      <style:text-properties fo:font-variant="normal" fo:text-transform="none" fo:color="#ffe5e5" style:text-line-through-type="none" style:text-line-through-style="none" style:text-line-through-width="auto" style:text-line-through-color="font-color" style:text-position="0% 100%" fo:font-family="Dela Gothic One" style:font-family-asian="Dela Gothic One" style:font-family-complex="Dela Gothic One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0.38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ffe5e5" style:text-line-through-type="none" style:text-line-through-style="none" style:text-line-through-width="auto" style:text-line-through-color="font-color" style:text-position="0% 100%" fo:font-family="DM Sans" style:font-family-asian="DM Sans" style:font-family-complex="DM Sans" style:font-family-generic="swiss" style:font-family-generic-asian="swiss" style:font-family-generic-complex="swiss" style:font-pitch="variable" style:font-pitch-asian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0.37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e5e5" style:text-line-through-type="none" style:text-line-through-style="none" style:text-line-through-width="auto" style:text-line-through-color="font-color" style:text-position="0% 100%" fo:font-family="DM San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0.37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ffe5e5" style:text-line-through-type="none" style:text-line-through-style="none" style:text-line-through-width="auto" style:text-line-through-color="font-color" style:text-position="0% 100%" fo:font-family="DM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0.37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ffe5e5" style:text-line-through-type="none" style:text-line-through-style="none" style:text-line-through-width="auto" style:text-line-through-color="font-color" style:text-position="0% 100%" fo:font-family="DM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0.37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0.375in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ffe5e5" style:text-line-through-type="none" style:text-line-through-style="none" style:text-line-through-width="auto" style:text-line-through-color="font-color" style:text-position="0% 100%" fo:font-family="DM San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0.37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125in" svg:stroke-color="#ffffff" svg:stroke-opacity="100%" draw:auto-grow-width="false" draw:auto-grow-height="false" draw:decorative="true"/>
      <style:paragraph-properties style:font-independent-line-spacing="true" style:writing-mode="lr-tb"/>
    </style:style>
    <style:style style:family="presentation" style:name="a423">
      <style:graphic-properties draw:fill="none" draw:stroke="solid" svg:stroke-width="0.01389in" svg:stroke-color="#000000" svg:stroke-opacity="100%"/>
    </style:style>
    <style:style style:family="graphic" style:name="a36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3" style:parent-style-name="Graphics">
      <style:graphic-properties draw:fill="none" draw:stroke="non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" style:parent-style-name="Graphics">
      <style:graphic-properties draw:fill="none" draw:stroke="non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aebeb" style:text-line-through-type="none" style:text-line-through-style="none" style:text-line-through-width="auto" style:text-line-through-color="font-color" style:text-position="0% 100%" fo:font-family="Dela Gothic One" style:font-family-asian="Dela Gothic One" style:font-family-complex="Dela Gothic One" style:font-family-generic="swiss" style:font-family-generic-asian="swiss" style:font-family-generic-complex="swiss" style:font-pitch="variable" style:font-pitch-asian="variable" style:font-pitch-complex="variable" fo:font-size="0.85417in" style:font-size-asian="0.85417in" style:font-size-complex="0.854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5417in" style:font-size-asian="0.85417in" style:font-size-complex="0.854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.069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draw:fill="solid" draw:fill-color="#740b0b" draw:opacity="100%" draw:stroke="solid" svg:stroke-width="0.00833in" svg:stroke-color="#8d2424" svg:stroke-opacity="100%"/>
    </style:style>
    <style:style style:family="graphic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fe5e5" style:text-line-through-type="none" style:text-line-through-style="none" style:text-line-through-width="auto" style:text-line-through-color="font-color" style:text-position="0% 100%" fo:font-family="Dela Gothic One" style:font-family-asian="Dela Gothic One" style:font-family-complex="Dela Gothic One" style:font-family-generic="swiss" style:font-family-generic-asian="swiss" style:font-family-generic-complex="swiss" style:font-pitch="variable" style:font-pitch-asian="variable" style:font-pitch-complex="variable" fo:font-size="0.36806in" style:font-size-asian="0.36806in" style:font-size-complex="0.3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ffe5e5" style:text-line-through-type="none" style:text-line-through-style="none" style:text-line-through-width="auto" style:text-line-through-color="font-color" style:text-position="0% 100%" fo:font-family="DM Sans" style:font-family-asian="DM Sans" style:font-family-complex="DM Sans" style:font-family-generic="swiss" style:font-family-generic-asian="swiss" style:font-family-generic-complex="swiss" style:font-pitch="variable" style:font-pitch-asian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806in" style:font-size-asian="0.36806in" style:font-size-complex="0.3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0.3680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e5e5" style:text-line-through-type="none" style:text-line-through-style="none" style:text-line-through-width="auto" style:text-line-through-color="font-color" style:text-position="0% 100%" fo:font-family="Dela Gothic One" style:font-family-asian="Dela Gothic One" style:font-family-complex="Dela Gothic One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0.38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3" style:parent-style-name="Graphics">
      <style:graphic-properties draw:fill="none" draw:stroke="none"/>
    </style:style>
    <style:style style:family="presentation" style:name="a374">
      <style:graphic-properties draw:fill="none" draw:stroke="solid" svg:stroke-width="0.01389in" svg:stroke-color="#000000" svg:stroke-opacity="100%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0.37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ffe5e5" style:text-line-through-type="none" style:text-line-through-style="none" style:text-line-through-width="auto" style:text-line-through-color="font-color" style:text-position="0% 100%" fo:font-family="DM Sans" style:font-family-asian="DM Sans" style:font-family-complex="DM Sans" style:font-family-generic="swiss" style:font-family-generic-asian="swiss" style:font-family-generic-complex="swiss" style:font-pitch="variable" style:font-pitch-asian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0.37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ffe5e5" style:text-line-through-type="none" style:text-line-through-style="none" style:text-line-through-width="auto" style:text-line-through-color="font-color" style:text-position="0% 100%" fo:font-family="DM Sans" style:font-family-asian="DM Sans" style:font-family-complex="DM Sans" style:font-family-generic="swiss" style:font-family-generic-asian="swiss" style:font-family-generic-complex="swiss" style:font-pitch="variable" style:font-pitch-asian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ffe5e5" style:text-line-through-type="none" style:text-line-through-style="none" style:text-line-through-width="auto" style:text-line-through-color="font-color" style:text-position="0% 100%" fo:font-family="DM Sans" style:font-family-asian="DM Sans" style:font-family-complex="DM Sans" style:font-family-generic="swiss" style:font-family-generic-asian="swiss" style:font-family-generic-complex="swiss" style:font-pitch="variable" style:font-pitch-asian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0.37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0.37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4">
      <style:graphic-properties draw:fill="solid" draw:fill-color="#740b0b" draw:opacity="100%" draw:stroke="solid" svg:stroke-width="0.00833in" svg:stroke-color="#8d2424" svg:stroke-opacity="100%"/>
    </style:style>
    <style:style style:family="text" style:name="a225">
      <style:text-properties fo:font-variant="normal" fo:text-transform="none" fo:color="#ffe5e5" style:text-line-through-type="none" style:text-line-through-style="none" style:text-line-through-width="auto" style:text-line-through-color="font-color" style:text-position="0% 100%" fo:font-family="Dela Gothic One" style:font-family-asian="Dela Gothic One" style:font-family-complex="Dela Gothic One" style:font-family-generic="swiss" style:font-family-generic-asian="swiss" style:font-family-generic-complex="swiss" style:font-pitch="variable" style:font-pitch-asian="variable" style:font-pitch-complex="variable" fo:font-size="0.36806in" style:font-size-asian="0.36806in" style:font-size-complex="0.3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806in" style:font-size-asian="0.36806in" style:font-size-complex="0.3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0.3680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ffe5e5" style:text-line-through-type="none" style:text-line-through-style="none" style:text-line-through-width="auto" style:text-line-through-color="font-color" style:text-position="0% 100%" fo:font-family="Dela Gothic One" style:font-family-asian="Dela Gothic One" style:font-family-complex="Dela Gothic One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aebeb" style:text-line-through-type="none" style:text-line-through-style="none" style:text-line-through-width="auto" style:text-line-through-color="font-color" style:text-position="0% 100%" fo:font-family="Dela Gothic One" style:font-family-asian="Dela Gothic One" style:font-family-complex="Dela Gothic One" style:font-family-generic-complex="swiss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aebeb" style:text-line-through-type="none" style:text-line-through-style="none" style:text-line-through-width="auto" style:text-line-through-color="font-color" style:text-position="0% 100%" fo:font-family="Dela Gothic One" style:font-family-asian="Dela Gothic On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aebeb" style:text-line-through-type="none" style:text-line-through-style="none" style:text-line-through-width="auto" style:text-line-through-color="font-color" style:text-position="0% 100%" fo:font-family="Dela Gothic One" style:font-family-asian="Dela Gothic On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.069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e5e5" style:text-line-through-type="none" style:text-line-through-style="none" style:text-line-through-width="auto" style:text-line-through-color="font-color" style:text-position="0% 100%" fo:font-family="DM San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0.37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9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Segoe U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Segoe U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Segoe U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Segoe U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re Franklin" style:font-family-complex="Segoe U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re Franklin" style:font-family-complex="Segoe U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1">
      <style:paragraph-properties fo:line-height="0.38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re Franklin" style:font-family-complex="Segoe U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re Franklin" style:font-family-complex="Segoe U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3">
      <style:text-properties fo:font-variant="normal" fo:text-transform="none" fo:color="#ffe5e5" style:text-line-through-type="none" style:text-line-through-style="none" style:text-line-through-width="auto" style:text-line-through-color="font-color" style:text-position="0% 100%" fo:font-family="DM Sans" style:font-family-asian="DM Sans" style:font-family-complex="DM Sans" style:font-family-generic="swiss" style:font-family-generic-asian="swiss" style:font-family-generic-complex="swiss" style:font-pitch="variable" style:font-pitch-asian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0.37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7">
      <style:graphic-properties draw:fill="solid" draw:fill-color="#740b0b" draw:opacity="100%" draw:stroke="solid" svg:stroke-width="0.00833in" svg:stroke-color="#8d2424" svg:stroke-opacity="100%"/>
    </style:style>
    <style:style style:family="text" style:name="a238">
      <style:text-properties fo:font-variant="normal" fo:text-transform="none" fo:color="#ffe5e5" style:text-line-through-type="none" style:text-line-through-style="none" style:text-line-through-width="auto" style:text-line-through-color="font-color" style:text-position="0% 100%" fo:font-family="Dela Gothic One" style:font-family-asian="Dela Gothic One" style:font-family-complex="Dela Gothic One" style:font-family-generic="swiss" style:font-family-generic-asian="swiss" style:font-family-generic-complex="swiss" style:font-pitch="variable" style:font-pitch-asian="variable" style:font-pitch-complex="variable" fo:font-size="0.36806in" style:font-size-asian="0.36806in" style:font-size-complex="0.3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806in" style:font-size-asian="0.36806in" style:font-size-complex="0.3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e5e5" style:text-line-through-type="none" style:text-line-through-style="none" style:text-line-through-width="auto" style:text-line-through-color="font-color" style:text-position="0% 100%" fo:font-family="DM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e5e5" style:text-line-through-type="none" style:text-line-through-style="none" style:text-line-through-width="auto" style:text-line-through-color="font-color" style:text-position="0% 100%" fo:font-family="DM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e5e5" style:text-line-through-type="none" style:text-line-through-style="none" style:text-line-through-width="auto" style:text-line-through-color="font-color" style:text-position="0% 100%" fo:font-family="DM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e5e5" style:text-line-through-type="none" style:text-line-through-style="none" style:text-line-through-width="auto" style:text-line-through-color="font-color" style:text-position="0% 100%" fo:font-family="DM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0.375in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re Franklin" style:font-family-complex="Segoe U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e5e5" style:text-line-through-type="none" style:text-line-through-style="none" style:text-line-through-width="auto" style:text-line-through-color="font-color" style:text-position="0% 100%" fo:font-family="DM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draw:fill="none" draw:stroke="solid" svg:stroke-width="0.01389in" svg:stroke-color="#000000" svg:stroke-opacity="100%"/>
    </style:style>
    <style:style style:family="paragraph" style:name="a240">
      <style:paragraph-properties fo:line-height="0.3680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1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ffe5e5" style:text-line-through-type="none" style:text-line-through-style="none" style:text-line-through-width="auto" style:text-line-through-color="font-color" style:text-position="0% 100%" fo:font-family="Dela Gothic One" style:font-family-asian="Dela Gothic One" style:font-family-complex="Dela Gothic One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0.38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e5e5" style:text-line-through-type="none" style:text-line-through-style="none" style:text-line-through-width="auto" style:text-line-through-color="font-color" style:text-position="0% 100%" fo:font-family="DM Sans" style:font-family-asian="DM Sans" style:font-family-complex="DM Sans" style:font-family-generic="swiss" style:font-family-generic-asian="swiss" style:font-family-generic-complex="swiss" style:font-pitch="variable" style:font-pitch-asian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8">
      <style:paragraph-properties fo:line-height="0.37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05">
      <style:graphic-properties draw:fill="none" draw:stroke="solid" svg:stroke-width="0.01389in" svg:stroke-color="#000000" svg:stroke-opacity="100%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2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3" style:parent-style-name="Graphics">
      <style:graphic-properties draw:fill="none" draw:stroke="none"/>
    </style:style>
    <style:style style:family="text" style:name="a194">
      <style:text-properties fo:font-variant="normal" fo:text-transform="none" fo:color="#faebeb" style:text-line-through-type="none" style:text-line-through-style="none" style:text-line-through-width="auto" style:text-line-through-color="font-color" style:text-position="0% 100%" fo:font-family="Dela Gothic One" style:font-family-asian="Dela Gothic One" style:font-family-complex="Dela Gothic One" style:font-family-generic="swiss" style:font-family-generic-asian="swiss" style:font-family-generic-complex="swiss" style:font-pitch="variable" style:font-pitch-asian="variable" style:font-pitch-complex="variable" fo:font-size="0.61806in" style:font-size-asian="0.61806in" style:font-size-complex="0.61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806in" style:font-size-asian="0.61806in" style:font-size-complex="0.61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0.777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draw:fill="solid" draw:fill-color="#740b0b" draw:opacity="100%" draw:stroke="solid" svg:stroke-width="0.00833in" svg:stroke-color="#8d2424" svg:stroke-opacity="100%"/>
    </style:style>
    <style:style style:family="graphic" style:name="a25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ffe5e5" style:text-line-through-type="none" style:text-line-through-style="none" style:text-line-through-width="auto" style:text-line-through-color="font-color" style:text-position="0% 100%" fo:font-family="Dela Gothic One" style:font-family-asian="Dela Gothic One" style:font-family-complex="Dela Gothic One" style:font-family-generic="swiss" style:font-family-generic-asian="swiss" style:font-family-generic-complex="swiss" style:font-pitch="variable" style:font-pitch-asian="variable" style:font-pitch-complex="variable" fo:font-size="0.36806in" style:font-size-asian="0.36806in" style:font-size-complex="0.3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">
      <style:graphic-properties draw:fill="none" draw:stroke="solid" svg:stroke-width="0.01389in" svg:stroke-color="#000000" svg:stroke-opacity="100%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faebeb" style:text-line-through-type="none" style:text-line-through-style="none" style:text-line-through-width="auto" style:text-line-through-color="font-color" style:text-position="0% 100%" fo:font-family="Dela Gothic One" style:font-family-asian="Dela Gothic One" style:font-family-complex="Dela Gothic One" style:font-family-generic-complex="swiss" style:font-pitch-complex="variable" fo:font-size="0.85417in" style:font-size-asian="0.85417in" style:font-size-complex="0.8541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3">
      <style:paragraph-properties fo:line-height="1.069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4">
      <style:text-properties fo:font-variant="normal" fo:text-transform="none" fo:color="#faebeb" style:text-line-through-type="none" style:text-line-through-style="none" style:text-line-through-width="auto" style:text-line-through-color="font-color" style:text-position="0% 100%" fo:font-family="Dela Gothic One" style:font-family-asian="Dela Gothic One" fo:font-size="0.85417in" style:font-size-asian="0.85417in" style:font-size-complex="0.8541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.069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faebeb" style:text-line-through-type="none" style:text-line-through-style="none" style:text-line-through-width="auto" style:text-line-through-color="font-color" style:text-position="0% 100%" fo:font-family="Dela Gothic One" style:font-family-asian="Dela Gothic One" fo:font-size="0.85417in" style:font-size-asian="0.85417in" style:font-size-complex="0.8541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.069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ffe5e5" style:text-line-through-type="none" style:text-line-through-style="none" style:text-line-through-width="auto" style:text-line-through-color="font-color" style:text-position="0% 100%" fo:font-family="DM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398">
      <text:list-level-style-bullet text:level="1" text:bullet-char="o">
        <style:list-level-properties text:space-before="0in" text:min-label-width="0.562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562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562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562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5625in"/>
        <style:text-properties fo:font-family="Courier New" fo:font-size="100%"/>
      </text:list-level-style-bullet>
      <text:list-level-style-bullet text:level="6" text:bullet-char="o">
        <style:list-level-properties text:space-before="2.5in" text:min-label-width="0.5625in"/>
        <style:text-properties fo:font-family="Courier New" fo:font-size="100%"/>
      </text:list-level-style-bullet>
      <text:list-level-style-bullet text:level="7" text:bullet-char="o">
        <style:list-level-properties text:space-before="3in" text:min-label-width="0.5625in"/>
        <style:text-properties fo:font-family="Courier New" fo:font-size="100%"/>
      </text:list-level-style-bullet>
      <text:list-level-style-bullet text:level="8" text:bullet-char="o">
        <style:list-level-properties text:space-before="3.5in" text:min-label-width="0.5625in"/>
        <style:text-properties fo:font-family="Courier New" fo:font-size="100%"/>
      </text:list-level-style-bullet>
      <text:list-level-style-bullet text:level="9" text:bullet-char="o">
        <style:list-level-properties text:space-before="4in" text:min-label-width="0.5625in"/>
        <style:text-properties fo:font-family="Courier New" fo:font-size="100%"/>
      </text:list-level-style-bullet>
    </text:list-style>
    <text:list-style style:name="a401">
      <text:list-level-style-bullet text:level="1" text:bullet-char="o">
        <style:list-level-properties text:space-before="0in" text:min-label-width="0.562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562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562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562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5625in"/>
        <style:text-properties fo:font-family="Courier New" fo:font-size="100%"/>
      </text:list-level-style-bullet>
      <text:list-level-style-bullet text:level="6" text:bullet-char="o">
        <style:list-level-properties text:space-before="2.5in" text:min-label-width="0.5625in"/>
        <style:text-properties fo:font-family="Courier New" fo:font-size="100%"/>
      </text:list-level-style-bullet>
      <text:list-level-style-bullet text:level="7" text:bullet-char="o">
        <style:list-level-properties text:space-before="3in" text:min-label-width="0.5625in"/>
        <style:text-properties fo:font-family="Courier New" fo:font-size="100%"/>
      </text:list-level-style-bullet>
      <text:list-level-style-bullet text:level="8" text:bullet-char="o">
        <style:list-level-properties text:space-before="3.5in" text:min-label-width="0.5625in"/>
        <style:text-properties fo:font-family="Courier New" fo:font-size="100%"/>
      </text:list-level-style-bullet>
      <text:list-level-style-bullet text:level="9" text:bullet-char="o">
        <style:list-level-properties text:space-before="4in" text:min-label-width="0.5625in"/>
        <style:text-properties fo:font-family="Courier New" fo:font-size="100%"/>
      </text:list-level-style-bullet>
    </text:list-style>
    <text:list-style style:name="a413">
      <text:list-level-style-bullet text:level="1" text:bullet-char="o">
        <style:list-level-properties text:space-before="0in" text:min-label-width="0.562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562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562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562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5625in"/>
        <style:text-properties fo:font-family="Courier New" fo:font-size="100%"/>
      </text:list-level-style-bullet>
      <text:list-level-style-bullet text:level="6" text:bullet-char="o">
        <style:list-level-properties text:space-before="2.5in" text:min-label-width="0.5625in"/>
        <style:text-properties fo:font-family="Courier New" fo:font-size="100%"/>
      </text:list-level-style-bullet>
      <text:list-level-style-bullet text:level="7" text:bullet-char="o">
        <style:list-level-properties text:space-before="3in" text:min-label-width="0.5625in"/>
        <style:text-properties fo:font-family="Courier New" fo:font-size="100%"/>
      </text:list-level-style-bullet>
      <text:list-level-style-bullet text:level="8" text:bullet-char="o">
        <style:list-level-properties text:space-before="3.5in" text:min-label-width="0.5625in"/>
        <style:text-properties fo:font-family="Courier New" fo:font-size="100%"/>
      </text:list-level-style-bullet>
      <text:list-level-style-bullet text:level="9" text:bullet-char="o">
        <style:list-level-properties text:space-before="4in" text:min-label-width="0.5625in"/>
        <style:text-properties fo:font-family="Courier New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09">
      <text:list-level-style-bullet text:level="1" text:bullet-char="o">
        <style:list-level-properties text:space-before="0in" text:min-label-width="0.562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562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562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562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5625in"/>
        <style:text-properties fo:font-family="Courier New" fo:font-size="100%"/>
      </text:list-level-style-bullet>
      <text:list-level-style-bullet text:level="6" text:bullet-char="o">
        <style:list-level-properties text:space-before="2.5in" text:min-label-width="0.5625in"/>
        <style:text-properties fo:font-family="Courier New" fo:font-size="100%"/>
      </text:list-level-style-bullet>
      <text:list-level-style-bullet text:level="7" text:bullet-char="o">
        <style:list-level-properties text:space-before="3in" text:min-label-width="0.5625in"/>
        <style:text-properties fo:font-family="Courier New" fo:font-size="100%"/>
      </text:list-level-style-bullet>
      <text:list-level-style-bullet text:level="8" text:bullet-char="o">
        <style:list-level-properties text:space-before="3.5in" text:min-label-width="0.5625in"/>
        <style:text-properties fo:font-family="Courier New" fo:font-size="100%"/>
      </text:list-level-style-bullet>
      <text:list-level-style-bullet text:level="9" text:bullet-char="o">
        <style:list-level-properties text:space-before="4in" text:min-label-width="0.5625in"/>
        <style:text-properties fo:font-family="Courier New" fo:font-size="100%"/>
      </text:list-level-style-bullet>
    </text:list-style>
    <text:list-style style:name="a416">
      <text:list-level-style-bullet text:level="1" text:bullet-char="o">
        <style:list-level-properties text:space-before="0in" text:min-label-width="0.562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562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562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562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5625in"/>
        <style:text-properties fo:font-family="Courier New" fo:font-size="100%"/>
      </text:list-level-style-bullet>
      <text:list-level-style-bullet text:level="6" text:bullet-char="o">
        <style:list-level-properties text:space-before="2.5in" text:min-label-width="0.5625in"/>
        <style:text-properties fo:font-family="Courier New" fo:font-size="100%"/>
      </text:list-level-style-bullet>
      <text:list-level-style-bullet text:level="7" text:bullet-char="o">
        <style:list-level-properties text:space-before="3in" text:min-label-width="0.5625in"/>
        <style:text-properties fo:font-family="Courier New" fo:font-size="100%"/>
      </text:list-level-style-bullet>
      <text:list-level-style-bullet text:level="8" text:bullet-char="o">
        <style:list-level-properties text:space-before="3.5in" text:min-label-width="0.5625in"/>
        <style:text-properties fo:font-family="Courier New" fo:font-size="100%"/>
      </text:list-level-style-bullet>
      <text:list-level-style-bullet text:level="9" text:bullet-char="o">
        <style:list-level-properties text:space-before="4in" text:min-label-width="0.5625in"/>
        <style:text-properties fo:font-family="Courier New" fo:font-size="100%"/>
      </text:list-level-style-bullet>
    </text:list-style>
    <text:list-style style:name="a421">
      <text:list-level-style-bullet text:level="1" text:bullet-char="o">
        <style:list-level-properties text:space-before="0in" text:min-label-width="0.562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562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562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562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5625in"/>
        <style:text-properties fo:font-family="Courier New" fo:font-size="100%"/>
      </text:list-level-style-bullet>
      <text:list-level-style-bullet text:level="6" text:bullet-char="o">
        <style:list-level-properties text:space-before="2.5in" text:min-label-width="0.5625in"/>
        <style:text-properties fo:font-family="Courier New" fo:font-size="100%"/>
      </text:list-level-style-bullet>
      <text:list-level-style-bullet text:level="7" text:bullet-char="o">
        <style:list-level-properties text:space-before="3in" text:min-label-width="0.5625in"/>
        <style:text-properties fo:font-family="Courier New" fo:font-size="100%"/>
      </text:list-level-style-bullet>
      <text:list-level-style-bullet text:level="8" text:bullet-char="o">
        <style:list-level-properties text:space-before="3.5in" text:min-label-width="0.5625in"/>
        <style:text-properties fo:font-family="Courier New" fo:font-size="100%"/>
      </text:list-level-style-bullet>
      <text:list-level-style-bullet text:level="9" text:bullet-char="o">
        <style:list-level-properties text:space-before="4in" text:min-label-width="0.5625in"/>
        <style:text-properties fo:font-family="Courier New" fo:font-size="100%"/>
      </text:list-level-style-bullet>
    </text:list-style>
    <text:list-style style:name="a28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406">
      <text:list-level-style-bullet text:level="1" text:bullet-char="o">
        <style:list-level-properties text:space-before="0in" text:min-label-width="0.562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562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562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562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5625in"/>
        <style:text-properties fo:font-family="Courier New" fo:font-size="100%"/>
      </text:list-level-style-bullet>
      <text:list-level-style-bullet text:level="6" text:bullet-char="o">
        <style:list-level-properties text:space-before="2.5in" text:min-label-width="0.5625in"/>
        <style:text-properties fo:font-family="Courier New" fo:font-size="100%"/>
      </text:list-level-style-bullet>
      <text:list-level-style-bullet text:level="7" text:bullet-char="o">
        <style:list-level-properties text:space-before="3in" text:min-label-width="0.5625in"/>
        <style:text-properties fo:font-family="Courier New" fo:font-size="100%"/>
      </text:list-level-style-bullet>
      <text:list-level-style-bullet text:level="8" text:bullet-char="o">
        <style:list-level-properties text:space-before="3.5in" text:min-label-width="0.5625in"/>
        <style:text-properties fo:font-family="Courier New" fo:font-size="100%"/>
      </text:list-level-style-bullet>
      <text:list-level-style-bullet text:level="9" text:bullet-char="o">
        <style:list-level-properties text:space-before="4in" text:min-label-width="0.5625in"/>
        <style:text-properties fo:font-family="Courier New" fo:font-size="100%"/>
      </text:list-level-style-bullet>
    </text:list-style>
  </office:automatic-styles>
  <office:body>
    <office:presentation>
      <draw:page draw:name="Slide5" draw:style-name="a134" draw:master-page-name="Master1-Layout1-cust-DEFAULT" presentation:presentation-page-layout-name="Master1-PPL1" draw:id="Slide-260">
        <draw:custom-shape svg:x="0in" svg:y="0in" svg:width="16in" svg:height="9in" draw:id="id12" draw:style-name="a137" draw:name="Rectangle 35">
          <svg:title/>
          <svg:desc/>
          <text:p text:style-name="a136" text:class-names="" text:cond-style-name=""><text:span text:style-name="a1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2.16919in" svg:height="9in" draw:id="id13" draw:style-name="a140" draw:name="Freeform: Shape 8">
          <svg:title/>
          <svg:desc/>
          <text:p text:style-name="a139" text:class-names="" text:cond-style-name=""><text:span text:style-name="a138" text:class-names=""/></text:p>
          <draw:enhanced-geometry xmlns:dr3d="urn:oasis:names:tc:opendocument:xmlns:dr3d:1.0" draw:type="non-primitive" svg:viewBox="0 0 9272922 6858000" draw:enhanced-path="M 0 0 L 1733417 0 3307976 0 8126249 0 8138896 31774 C 9193904 2682457 9193904 2682457 9193904 2682457 9299262 2988100 9299262 3446565 9193904 3752208 8709916 4968215 8331802 5918220 8036400 6660411 L 7957938 6857542 3307976 6857542 3307976 6858000 0 6858000 Z N" draw:text-areas="?f38 ?f40 ?f39 ?f41" draw:glue-points="?f23 ?f24 ?f25 ?f24 ?f26 ?f24 ?f27 ?f24 ?f28 ?f29 ?f30 ?f31 ?f30 ?f32 ?f33 ?f34 ?f35 ?f36 ?f26 ?f36 ?f26 ?f37 ?f23 ?f37" draw:glue-point-leaving-directions="-90, 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272922"/>
            <draw:equation draw:name="f7" draw:formula="?f4 / 6858000"/>
            <draw:equation draw:name="f8" draw:formula="0 * ?f5 / 9272922"/>
            <draw:equation draw:name="f9" draw:formula="0 * ?f4 / 6858000"/>
            <draw:equation draw:name="f10" draw:formula="1733417 * ?f5 / 9272922"/>
            <draw:equation draw:name="f11" draw:formula="3307976 * ?f5 / 9272922"/>
            <draw:equation draw:name="f12" draw:formula="8126249 * ?f5 / 9272922"/>
            <draw:equation draw:name="f13" draw:formula="8138896 * ?f5 / 9272922"/>
            <draw:equation draw:name="f14" draw:formula="31774 * ?f4 / 6858000"/>
            <draw:equation draw:name="f15" draw:formula="9193904 * ?f5 / 9272922"/>
            <draw:equation draw:name="f16" draw:formula="2682457 * ?f4 / 6858000"/>
            <draw:equation draw:name="f17" draw:formula="3752208 * ?f4 / 6858000"/>
            <draw:equation draw:name="f18" draw:formula="8036400 * ?f5 / 9272922"/>
            <draw:equation draw:name="f19" draw:formula="6660411 * ?f4 / 6858000"/>
            <draw:equation draw:name="f20" draw:formula="7957938 * ?f5 / 9272922"/>
            <draw:equation draw:name="f21" draw:formula="6857542 * ?f4 / 6858000"/>
            <draw:equation draw:name="f22" draw:formula="6858000 * ?f4 / 6858000"/>
            <draw:equation draw:name="f23" draw:formula="?f8 / ?f6"/>
            <draw:equation draw:name="f24" draw:formula="?f9 / ?f7"/>
            <draw:equation draw:name="f25" draw:formula="?f10 / ?f6"/>
            <draw:equation draw:name="f26" draw:formula="?f11 / ?f6"/>
            <draw:equation draw:name="f27" draw:formula="?f12 / ?f6"/>
            <draw:equation draw:name="f28" draw:formula="?f13 / ?f6"/>
            <draw:equation draw:name="f29" draw:formula="?f14 / ?f7"/>
            <draw:equation draw:name="f30" draw:formula="?f15 / ?f6"/>
            <draw:equation draw:name="f31" draw:formula="?f16 / ?f7"/>
            <draw:equation draw:name="f32" draw:formula="?f17 / ?f7"/>
            <draw:equation draw:name="f33" draw:formula="?f18 / ?f6"/>
            <draw:equation draw:name="f34" draw:formula="?f19 / ?f7"/>
            <draw:equation draw:name="f35" draw:formula="?f20 / ?f6"/>
            <draw:equation draw:name="f36" draw:formula="?f21 / ?f7"/>
            <draw:equation draw:name="f37" draw:formula="?f22 / ?f7"/>
            <draw:equation draw:name="f38" draw:formula="?f0 / ?f6"/>
            <draw:equation draw:name="f39" draw:formula="?f1 / ?f6"/>
            <draw:equation draw:name="f40" draw:formula="?f2 / ?f7"/>
            <draw:equation draw:name="f41" draw:formula="?f3 / ?f7"/>
          </draw:enhanced-geometry>
        </draw:custom-shape>
        <draw:frame draw:id="id14" draw:style-name="a141" draw:name="Image 1" svg:x="1.81629in" svg:y="0.84444in" svg:width="7.30555in" svg:height="7.30555in" style:rel-width="scale" style:rel-height="scale">
          <draw:image xlink:href="media/image1.jpeg" xlink:type="simple" xlink:show="embed" xlink:actuate="onLoad"/>
          <svg:title/>
          <svg:desc>Une image contenant texte, graphisme, Graphique, affiche

Description générée automatiquement</svg:desc>
        </draw:frame>
        <draw:g draw:name="Group 10" draw:id="id15" draw:style-name="a142">
          <svg:title/>
          <svg:desc/>
          <draw:custom-shape svg:x="12.02173in" svg:y="1.86856in" svg:width="1.22708in" svg:height="1.08178in" draw:id="id17" draw:style-name="a148" draw:name="Freeform 5">
            <svg:title/>
            <svg:desc/>
            <text:p text:style-name="a147" text:class-names="" text:cond-style-name=""><text:span text:style-name="a146" text:class-names=""/></text:p>
            <draw:enhanced-geometry xmlns:dr3d="urn:oasis:names:tc:opendocument:xmlns:dr3d:1.0" draw:type="non-primitive" svg:viewBox="0 0 785 692" draw:enhanced-path="M 225 692 C 207 692 185 680 177 665 9 374 9 374 9 374 0 358 0 334 9 318 177 27 177 27 177 27 185 12 207 0 225 0 561 0 561 0 561 0 578 0 600 12 609 27 777 318 777 318 777 318 785 334 785 358 777 374 609 665 609 665 609 665 600 680 578 692 561 692 L 225 692 Z N" draw:text-areas="?f32 ?f34 ?f33 ?f35" draw:glue-points="?f20 ?f21 ?f22 ?f23 ?f24 ?f25 ?f24 ?f26 ?f22 ?f27 ?f20 ?f28 ?f29 ?f28 ?f30 ?f27 ?f31 ?f26 ?f31 ?f25 ?f30 ?f23 ?f29 ?f21 ?f20 ?f21" draw:glue-point-leaving-directions="-90, -90, -90, -90, 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5"/>
              <draw:equation draw:name="f7" draw:formula="?f4 / 692"/>
              <draw:equation draw:name="f8" draw:formula="225 * ?f5 / 785"/>
              <draw:equation draw:name="f9" draw:formula="692 * ?f4 / 692"/>
              <draw:equation draw:name="f10" draw:formula="177 * ?f5 / 785"/>
              <draw:equation draw:name="f11" draw:formula="665 * ?f4 / 692"/>
              <draw:equation draw:name="f12" draw:formula="9 * ?f5 / 785"/>
              <draw:equation draw:name="f13" draw:formula="374 * ?f4 / 692"/>
              <draw:equation draw:name="f14" draw:formula="318 * ?f4 / 692"/>
              <draw:equation draw:name="f15" draw:formula="27 * ?f4 / 692"/>
              <draw:equation draw:name="f16" draw:formula="0 * ?f4 / 692"/>
              <draw:equation draw:name="f17" draw:formula="561 * ?f5 / 785"/>
              <draw:equation draw:name="f18" draw:formula="609 * ?f5 / 785"/>
              <draw:equation draw:name="f19" draw:formula="777 * ?f5 / 78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7"/>
              <draw:equation draw:name="f26" draw:formula="?f14 / ?f7"/>
              <draw:equation draw:name="f27" draw:formula="?f15 / ?f7"/>
              <draw:equation draw:name="f28" draw:formula="?f16 / ?f7"/>
              <draw:equation draw:name="f29" draw:formula="?f17 / ?f6"/>
              <draw:equation draw:name="f30" draw:formula="?f18 / ?f6"/>
              <draw:equation draw:name="f31" draw:formula="?f19 / ?f6"/>
              <draw:equation draw:name="f32" draw:formula="0 / ?f6"/>
              <draw:equation draw:name="f33" draw:formula="?f1 / ?f6"/>
              <draw:equation draw:name="f34" draw:formula="0 / ?f7"/>
              <draw:equation draw:name="f35" draw:formula="?f3 / ?f7"/>
            </draw:enhanced-geometry>
          </draw:custom-shape>
          <draw:custom-shape svg:x="13.07173in" svg:y="1.41101in" svg:width="1.00022in" svg:height="0.88178in" draw:id="id18" draw:style-name="a151" draw:name="Freeform 5">
            <svg:title/>
            <svg:desc/>
            <text:p text:style-name="a150" text:class-names="" text:cond-style-name=""><text:span text:style-name="a149" text:class-names=""/></text:p>
            <draw:enhanced-geometry xmlns:dr3d="urn:oasis:names:tc:opendocument:xmlns:dr3d:1.0" draw:type="non-primitive" svg:viewBox="0 0 785 692" draw:enhanced-path="M 225 692 C 207 692 185 680 177 665 9 374 9 374 9 374 0 358 0 334 9 318 177 27 177 27 177 27 185 12 207 0 225 0 561 0 561 0 561 0 578 0 600 12 609 27 777 318 777 318 777 318 785 334 785 358 777 374 609 665 609 665 609 665 600 680 578 692 561 692 L 225 692 Z N" draw:text-areas="?f32 ?f34 ?f33 ?f35" draw:glue-points="?f20 ?f21 ?f22 ?f23 ?f24 ?f25 ?f24 ?f26 ?f22 ?f27 ?f20 ?f28 ?f29 ?f28 ?f30 ?f27 ?f31 ?f26 ?f31 ?f25 ?f30 ?f23 ?f29 ?f21 ?f20 ?f21" draw:glue-point-leaving-directions="-90, -90, -90, -90, 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5"/>
              <draw:equation draw:name="f7" draw:formula="?f4 / 692"/>
              <draw:equation draw:name="f8" draw:formula="225 * ?f5 / 785"/>
              <draw:equation draw:name="f9" draw:formula="692 * ?f4 / 692"/>
              <draw:equation draw:name="f10" draw:formula="177 * ?f5 / 785"/>
              <draw:equation draw:name="f11" draw:formula="665 * ?f4 / 692"/>
              <draw:equation draw:name="f12" draw:formula="9 * ?f5 / 785"/>
              <draw:equation draw:name="f13" draw:formula="374 * ?f4 / 692"/>
              <draw:equation draw:name="f14" draw:formula="318 * ?f4 / 692"/>
              <draw:equation draw:name="f15" draw:formula="27 * ?f4 / 692"/>
              <draw:equation draw:name="f16" draw:formula="0 * ?f4 / 692"/>
              <draw:equation draw:name="f17" draw:formula="561 * ?f5 / 785"/>
              <draw:equation draw:name="f18" draw:formula="609 * ?f5 / 785"/>
              <draw:equation draw:name="f19" draw:formula="777 * ?f5 / 78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7"/>
              <draw:equation draw:name="f26" draw:formula="?f14 / ?f7"/>
              <draw:equation draw:name="f27" draw:formula="?f15 / ?f7"/>
              <draw:equation draw:name="f28" draw:formula="?f16 / ?f7"/>
              <draw:equation draw:name="f29" draw:formula="?f17 / ?f6"/>
              <draw:equation draw:name="f30" draw:formula="?f18 / ?f6"/>
              <draw:equation draw:name="f31" draw:formula="?f19 / ?f6"/>
              <draw:equation draw:name="f32" draw:formula="0 / ?f6"/>
              <draw:equation draw:name="f33" draw:formula="?f1 / ?f6"/>
              <draw:equation draw:name="f34" draw:formula="0 / ?f7"/>
              <draw:equation draw:name="f35" draw:formula="?f3 / ?f7"/>
            </draw:enhanced-geometry>
          </draw:custom-shape>
        </draw:g>
        <draw:custom-shape svg:x="14.09101in" svg:y="8.49445in" svg:width="1.77496in" svg:height="0.38035in" draw:id="id16" draw:style-name="a145" draw:name="Rectangle : coins arrondis 3">
          <svg:title/>
          <svg:desc/>
          <text:p text:style-name="a144" text:class-names="" text:cond-style-name=""><text:span text:style-name="a143" text:class-names="">1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</draw:page>
      <draw:page draw:name="Slide 1" draw:style-name="a152" draw:master-page-name="Master1-Layout2-cust-Slide-1-master" presentation:presentation-page-layout-name="Master1-PPL2" draw:id="Slide-256">
        <draw:frame draw:id="id19" draw:style-name="a153" draw:name="Image 0" svg:x="10in" svg:y="0in" svg:width="6in" svg:height="9in" style:rel-width="scale" style:rel-height="scale">
          <draw:image xlink:href="media/image2.png" xlink:type="simple" xlink:show="embed" xlink:actuate="onLoad"/>
          <svg:title/>
          <svg:desc>preencoded.png</svg:desc>
        </draw:frame>
        <draw:frame draw:id="id20" draw:style-name="a154" draw:name="Image 1" svg:x="10.29622in" svg:y="2.69883in" svg:width="5.40755in" svg:height="3.60234in" style:rel-width="scale" style:rel-height="scale">
          <draw:image xlink:href="media/image3.png" xlink:type="simple" xlink:show="embed" xlink:actuate="onLoad"/>
          <svg:title/>
          <svg:desc>preencoded.png</svg:desc>
        </draw:frame>
        <draw:custom-shape svg:x="0.8293in" svg:y="1.33568in" svg:width="8.34141in" svg:height="4.3026in" draw:id="id21" draw:style-name="a158" draw:name="Text 0">
          <svg:title/>
          <svg:desc/>
          <text:p text:style-name="a157" text:class-names="" text:cond-style-name=""><text:span text:style-name="a155" text:class-names="">Cyberattaque chez Auchan : Données clients exposées</text:span><text:span text:style-name="a1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293in" svg:y="5.99362in" svg:width="8.34141in" svg:height="0.37917in" draw:id="id22" draw:style-name="a162" draw:name="Text 1">
          <svg:title/>
          <svg:desc/>
          <text:p text:style-name="a161" text:class-names="" text:cond-style-name=""><text:span text:style-name="a159" text:class-names="">Auchan victime d'une cyberattaque majeure.</text:span><text:span text:style-name="a1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293in" svg:y="6.63932in" svg:width="8.34141in" svg:height="0.37917in" draw:id="id23" draw:style-name="a166" draw:name="Text 2">
          <svg:title/>
          <svg:desc/>
          <text:p text:style-name="a165" text:class-names="" text:cond-style-name=""><text:span text:style-name="a163" text:class-names="">Données personnelles de clients fidélité exposées.</text:span><text:span text:style-name="a1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293in" svg:y="7.28503in" svg:width="8.34141in" svg:height="0.37917in" draw:id="id24" draw:style-name="a170" draw:name="Text 3">
          <svg:title/>
          <svg:desc/>
          <text:p text:style-name="a169" text:class-names="" text:cond-style-name=""><text:span text:style-name="a167" text:class-names="">Informations sensibles potentiellement compromises.</text:span><text:span text:style-name="a1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" draw:style-name="a182" draw:name="ZoneTexte 8" svg:x="10.2973in" svg:y="6.62838in" svg:width="5.4054in" svg:height="1.3127in">
          <draw:text-box>
            <text:p text:style-name="a175" text:class-names="" text:cond-style-name=""><text:span text:style-name="a171" text:class-names="">Article<text:s text:c="1"/></text:span><text:span text:style-name="a172" text:class-names="">rédigé</text:span><text:span text:style-name="a173" text:class-names=""><text:s text:c="1"/>par</text:span><text:span text:style-name="a174" text:class-names="">​</text:span></text:p>
            <text:p text:style-name="a181" text:class-names="" text:cond-style-name=""><text:span text:style-name="a176" text:class-names=""><text:a xlink:href="https://www.lemondeinformatique.fr/actualites/auteur-jacques-cheminat-572.html" text:style-name="" text:visited-style-name="">Jacques Cheminat</text:a></text:span><text:span text:style-name="a177" text:class-names="">,<text:s text:c="1"/></text:span><text:span text:style-name="a178" text:class-names="">publié</text:span><text:span text:style-name="a179" text:class-names=""><text:s text:c="1"/>le 19 Novembre 2024</text:span><text:span text:style-name="a180" text:class-names="">​</text:span></text:p>
          </draw:text-box>
          <svg:title/>
          <svg:desc/>
        </draw:frame>
        <draw:custom-shape svg:x="14.09101in" svg:y="8.49445in" svg:width="1.77496in" svg:height="0.38035in" draw:id="id26" draw:style-name="a185" draw:name="Rectangle : coins arrondis 9">
          <svg:title/>
          <svg:desc/>
          <text:p text:style-name="a184" text:class-names="" text:cond-style-name=""><text:span text:style-name="a183" text:class-names="">2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presentation:notes draw:style-name="a191">
          <draw:page-thumbnail draw:page-number="2" svg:x="-0.29861in" svg:y="2in" svg:width="9.59722in" svg:height="5.39931in" presentation:class="page" draw:id="id27" presentation:style-name="a186" draw:name="Slide Image Placeholder 1">
            <svg:title/>
            <svg:desc/>
          </draw:page-thumbnail>
          <draw:frame draw:id="id28" presentation:style-name="a187" draw:name="Notes Placeholder 2" svg:x="0.89931in" svg:y="7.69965in" svg:width="7.20139in" svg:height="6.30035in" presentation:class="notes" presentation:placeholder="true">
            <draw:text-box/>
            <svg:title/>
            <svg:desc/>
          </draw:frame>
          <draw:frame draw:id="id29" presentation:style-name="a190" draw:name="Slide Number Placeholder 3" svg:x="5.09722in" svg:y="15.19792in" svg:width="3.90104in" svg:height="0.80208in" presentation:class="page-number" presentation:placeholder="false">
            <draw:text-box>
              <text:p text:style-name="a189" text:class-names="" text:cond-style-name=""><text:span text:style-name="a188" text:class-names=""><text:page-number style:num-format="1" text:fixed="false">2</text:page-number></text:span></text:p>
            </draw:text-box>
            <svg:title/>
            <svg:desc/>
          </draw:frame>
        </presentation:notes>
      </draw:page>
      <draw:page draw:name="Slide 2" draw:style-name="a192" draw:master-page-name="Master1-Layout3-cust-Slide-2-master" presentation:presentation-page-layout-name="Master1-PPL3" draw:id="Slide-257">
        <draw:frame draw:id="id30" draw:style-name="a193" draw:name="Image 0" svg:x="10in" svg:y="0in" svg:width="6in" svg:height="9in" style:rel-width="scale" style:rel-height="scale">
          <draw:image xlink:href="media/image4.png" xlink:type="simple" xlink:show="embed" xlink:actuate="onLoad"/>
          <svg:title/>
          <svg:desc>preencoded.png</svg:desc>
        </draw:frame>
        <draw:custom-shape svg:x="0.8293in" svg:y="1.09922in" svg:width="8.34141in" svg:height="1.55885in" draw:id="id31" draw:style-name="a197" draw:name="Text 0">
          <svg:title/>
          <svg:desc/>
          <text:p text:style-name="a196" text:class-names="" text:cond-style-name=""><text:span text:style-name="a194" text:class-names="">Impact et mesures de sécurité</text:span><text:span text:style-name="a1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293in" svg:y="3.27995in" svg:width="0.53307in" svg:height="0.53307in" draw:id="id32" draw:style-name="a198" draw:name="Shape 1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033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0.98581in" svg:y="3.35937in" svg:width="0.21992in" svg:height="0.37409in" draw:id="id33" draw:style-name="a202" draw:name="Text 2">
          <svg:title/>
          <svg:desc/>
          <text:p text:style-name="a201" text:class-names="" text:cond-style-name=""><text:span text:style-name="a199" text:class-names="">1</text:span><text:span text:style-name="a2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9922in" svg:y="3.27995in" svg:width="3.28242in" svg:height="0.77917in" draw:id="id34" draw:style-name="a206" draw:name="Text 3">
          <svg:title/>
          <svg:desc/>
          <text:p text:style-name="a205" text:class-names="" text:cond-style-name=""><text:span text:style-name="a203" text:class-names="">Données exposées</text:span><text:span text:style-name="a2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9922in" svg:y="4.20117in" svg:width="3.28242in" svg:height="1.1375in" draw:id="id35" draw:style-name="a210" draw:name="Text 4">
          <svg:title/>
          <svg:desc/>
          <text:p text:style-name="a209" text:class-names="" text:cond-style-name=""><text:span text:style-name="a207" text:class-names="">Noms, adresses, téléphones et cagnottes fidélité compromis.</text:span><text:span text:style-name="a2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1849in" svg:y="3.27995in" svg:width="0.53307in" svg:height="0.53307in" draw:id="id36" draw:style-name="a211" draw:name="Shape 5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033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5.22878in" svg:y="3.35937in" svg:width="0.31237in" svg:height="0.37409in" draw:id="id37" draw:style-name="a215" draw:name="Text 6">
          <svg:title/>
          <svg:desc/>
          <text:p text:style-name="a214" text:class-names="" text:cond-style-name=""><text:span text:style-name="a212" text:class-names="">2</text:span><text:span text:style-name="a2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8841in" svg:y="3.27995in" svg:width="3.28242in" svg:height="0.77917in" draw:id="id38" draw:style-name="a219" draw:name="Text 7">
          <svg:title/>
          <svg:desc/>
          <text:p text:style-name="a218" text:class-names="" text:cond-style-name=""><text:span text:style-name="a216" text:class-names="">Données sécurisées</text:span><text:span text:style-name="a2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8841in" svg:y="4.20117in" svg:width="3.28242in" svg:height="1.1375in" draw:id="id39" draw:style-name="a223" draw:name="Text 8">
          <svg:title/>
          <svg:desc/>
          <text:p text:style-name="a222" text:class-names="" text:cond-style-name=""><text:span text:style-name="a220" text:class-names="">Codes PIN, mots de passe et coordonnées bancaires préservés.</text:span><text:span text:style-name="a2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293in" svg:y="5.84206in" svg:width="0.53307in" svg:height="0.53307in" draw:id="id40" draw:style-name="a224" draw:name="Shape 9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033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0.93099in" svg:y="5.92148in" svg:width="0.32956in" svg:height="0.37409in" draw:id="id41" draw:style-name="a228" draw:name="Text 10">
          <svg:title/>
          <svg:desc/>
          <text:p text:style-name="a227" text:class-names="" text:cond-style-name=""><text:span text:style-name="a225" text:class-names="">3</text:span><text:span text:style-name="a2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9922in" svg:y="5.84206in" svg:width="3.28242in" svg:height="0.77917in" draw:id="id42" draw:style-name="a232" draw:name="Text 11">
          <svg:title/>
          <svg:desc/>
          <text:p text:style-name="a231" text:class-names="" text:cond-style-name=""><text:span text:style-name="a229" text:class-names="">Actions entreprises</text:span><text:span text:style-name="a2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9922in" svg:y="6.76328in" svg:width="3.28242in" svg:height="0.75833in" draw:id="id43" draw:style-name="a236" draw:name="Text 12">
          <svg:title/>
          <svg:desc/>
          <text:p text:style-name="a235" text:class-names="" text:cond-style-name=""><text:span text:style-name="a233" text:class-names="">Notification à la CNIL et renforcement des contrôles.</text:span><text:span text:style-name="a2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1849in" svg:y="5.84206in" svg:width="0.53307in" svg:height="0.53307in" draw:id="id44" draw:style-name="a237" draw:name="Shape 13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033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5.21224in" svg:y="5.92148in" svg:width="0.34557in" svg:height="0.37409in" draw:id="id45" draw:style-name="a241" draw:name="Text 14">
          <svg:title/>
          <svg:desc/>
          <text:p text:style-name="a240" text:class-names="" text:cond-style-name=""><text:span text:style-name="a238" text:class-names="">4</text:span><text:span text:style-name="a2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8841in" svg:y="5.84206in" svg:width="3.28242in" svg:height="0.77917in" draw:id="id46" draw:style-name="a245" draw:name="Text 15">
          <svg:title/>
          <svg:desc/>
          <text:p text:style-name="a244" text:class-names="" text:cond-style-name=""><text:span text:style-name="a242" text:class-names="">Vigilance recommandée</text:span><text:span text:style-name="a2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8841in" svg:y="6.76328in" svg:width="3.28242in" svg:height="1.1375in" draw:id="id47" draw:style-name="a249" draw:name="Text 16">
          <svg:title/>
          <svg:desc/>
          <text:p text:style-name="a248" text:class-names="" text:cond-style-name=""><text:span text:style-name="a246" text:class-names="">Risques d'appels frauduleux et campagnes de spam accrus.</text:span><text:span text:style-name="a2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4.09101in" svg:y="8.49445in" svg:width="1.77496in" svg:height="0.38035in" draw:id="id48" draw:style-name="a252" draw:name="Rectangle : coins arrondis 20">
          <svg:title/>
          <svg:desc/>
          <text:p text:style-name="a251" text:class-names="" text:cond-style-name=""><text:span text:style-name="a250" text:class-names="">3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presentation:notes draw:style-name="a258">
          <draw:page-thumbnail draw:page-number="3" svg:x="-0.29861in" svg:y="2in" svg:width="9.59722in" svg:height="5.39931in" presentation:class="page" draw:id="id49" presentation:style-name="a253" draw:name="Slide Image Placeholder 1">
            <svg:title/>
            <svg:desc/>
          </draw:page-thumbnail>
          <draw:frame draw:id="id50" presentation:style-name="a254" draw:name="Notes Placeholder 2" svg:x="0.89931in" svg:y="7.69965in" svg:width="7.20139in" svg:height="6.30035in" presentation:class="notes" presentation:placeholder="true">
            <draw:text-box/>
            <svg:title/>
            <svg:desc/>
          </draw:frame>
          <draw:frame draw:id="id51" presentation:style-name="a257" draw:name="Slide Number Placeholder 3" svg:x="5.09722in" svg:y="15.19792in" svg:width="3.90104in" svg:height="0.80208in" presentation:class="page-number" presentation:placeholder="false">
            <draw:text-box>
              <text:p text:style-name="a256" text:class-names="" text:cond-style-name=""><text:span text:style-name="a255" text:class-names=""><text:page-number style:num-format="1" text:fixed="false">3</text:page-number></text:span></text:p>
            </draw:text-box>
            <svg:title/>
            <svg:desc/>
          </draw:frame>
        </presentation:notes>
      </draw:page>
      <draw:page draw:name="Slide3" draw:style-name="a259" draw:master-page-name="Master1-Layout3-cust-Slide-2-master" presentation:presentation-page-layout-name="Master1-PPL3" draw:id="Slide-258">
        <draw:custom-shape svg:x="9.82192in" svg:y="0.76712in" svg:width="5.65753in" svg:height="7in" draw:id="id52" draw:style-name="a262" draw:name="Rectangle : coins arrondis 8">
          <svg:title/>
          <svg:desc/>
          <text:p text:style-name="a261" text:class-names="" text:cond-style-name=""><text:span text:style-name="a26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53" draw:style-name="a263" draw:name="Image 2" svg:x="0in" svg:y="0in" svg:width="9.12653in" svg:height="9.00476in" style:rel-width="scale" style:rel-height="scale">
          <draw:image xlink:href="media/image5.jpeg" xlink:type="simple" xlink:show="embed" xlink:actuate="onLoad"/>
          <svg:title/>
          <svg:desc>Une image contenant roue, véhicule, Véhicule terrestre, pneu

Description générée automatiquement</svg:desc>
        </draw:frame>
        <draw:frame draw:id="id54" draw:style-name="a269" draw:name="ZoneTexte 3" svg:x="9.93151in" svg:y="1.38356in" svg:width="5.42466in" svg:height="1.7166in">
          <draw:text-box>
            <text:p text:style-name="a268" text:class-names="" text:cond-style-name=""><text:span text:style-name="a264" text:class-names="">Vulnérabilité des voitures<text:s text:c="1"/></text:span><text:span text:style-name="a265" text:class-names="">kia</text:span><text:span text:style-name="a266" text:class-names=""><text:s text:c="1"/></text:span><text:span text:style-name="a267" text:class-names=""/></text:p>
          </draw:text-box>
          <svg:title/>
          <svg:desc/>
        </draw:frame>
        <draw:frame draw:id="id55" draw:style-name="a274" draw:name="ZoneTexte 4" svg:x="9.93151in" svg:y="3.38356in" svg:width="5.52055in" svg:height="0.5722in">
          <draw:text-box>
            <text:list text:style-name="a273">
              <text:list-item>
                <text:p text:style-name="a272" text:class-names="" text:cond-style-name=""><text:span text:style-name="a270" text:class-names="">Le fonctionnement de l'attaque<text:s text:c="1"/></text:span><text:span text:style-name="a271" text:class-names=""/></text:p>
              </text:list-item>
            </text:list>
          </draw:text-box>
          <svg:title/>
          <svg:desc/>
        </draw:frame>
        <draw:frame draw:id="id56" draw:style-name="a279" draw:name="ZoneTexte 6" svg:x="9.93151in" svg:y="4.62719in" svg:width="5.24657in" svg:height="0.5722in">
          <draw:text-box>
            <text:list text:style-name="a278">
              <text:list-item>
                <text:p text:style-name="a277" text:class-names="" text:cond-style-name=""><text:span text:style-name="a275" text:class-names="">Impacts de cette vulnérabilité<text:s text:c="1"/></text:span><text:span text:style-name="a276" text:class-names=""/></text:p>
              </text:list-item>
            </text:list>
          </draw:text-box>
          <svg:title/>
          <svg:desc/>
        </draw:frame>
        <draw:frame draw:id="id57" draw:style-name="a283" draw:name="ZoneTexte 7" svg:x="9.93151in" svg:y="5.82434in" svg:width="5.24657in" svg:height="0.5722in">
          <draw:text-box>
            <text:list text:style-name="a282">
              <text:list-item>
                <text:p text:style-name="a281" text:class-names="" text:cond-style-name=""><text:span text:style-name="a280" text:class-names="">Infos à retenir<text:s text:c="1"/></text:span></text:p>
              </text:list-item>
            </text:list>
          </draw:text-box>
          <svg:title/>
          <svg:desc/>
        </draw:frame>
        <draw:custom-shape svg:x="14.09101in" svg:y="8.49445in" svg:width="1.77496in" svg:height="0.38035in" draw:id="id58" draw:style-name="a286" draw:name="Rectangle : coins arrondis 1">
          <svg:title/>
          <svg:desc/>
          <text:p text:style-name="a285" text:class-names="" text:cond-style-name=""><text:span text:style-name="a284" text:class-names="">4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</draw:page>
      <draw:page draw:name="Slide4" draw:style-name="a287" draw:master-page-name="Master1-Layout3-cust-Slide-2-master" presentation:presentation-page-layout-name="Master1-PPL3" draw:id="Slide-259">
        <draw:custom-shape svg:x="2.61644in" svg:y="0.91781in" svg:width="12.35616in" svg:height="7.17808in" draw:id="id59" draw:style-name="a290" draw:name="Rectangle : coins arrondis 5">
          <svg:title/>
          <svg:desc/>
          <text:p text:style-name="a289" text:class-names="" text:cond-style-name=""><text:span text:style-name="a28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60" draw:style-name="a291" draw:name="Image 1" svg:x="3.28082in" svg:y="1.60108in" svg:width="11.02733in" svg:height="5.79853in" style:rel-width="scale" style:rel-height="scale">
          <draw:image xlink:href="media/image6.jpeg" xlink:type="simple" xlink:show="embed" xlink:actuate="onLoad"/>
          <svg:title/>
          <svg:desc>Kia Patches Bug That Allowed Access to Cars With Just a License Plate  Number | PCMag</svg:desc>
        </draw:frame>
        <draw:frame draw:id="id61" draw:style-name="a292" draw:transform="translate(-0.77397in -0.78767in) rotate(-0.76794) translate(6.5024in 2.70794in)" draw:name="Graphique 2" svg:width="1.54795in" svg:height="1.57534in" style:rel-width="scale" style:rel-height="scale">
          <draw:image xlink:href="media/image7.svg" xlink:type="simple" xlink:show="embed" xlink:actuate="onLoad"/>
          <svg:title/>
          <svg:desc>Flèche vers le bas contour</svg:desc>
        </draw:frame>
        <draw:frame draw:id="id62" draw:style-name="a293" draw:transform="translate(-0.77397in -0.78767in) rotate(-4.55531) translate(3.83116in 4.18739in)" draw:name="Graphique 3" svg:width="1.54795in" svg:height="1.57534in" style:rel-width="scale" style:rel-height="scale">
          <draw:image xlink:href="media/image7.svg" xlink:type="simple" xlink:show="embed" xlink:actuate="onLoad"/>
          <svg:title/>
          <svg:desc>Flèche vers le bas contour</svg:desc>
        </draw:frame>
        <draw:frame draw:id="id63" draw:style-name="a294" draw:transform="translate(-0.77397in -0.78767in) rotate(-1.25664) translate(13.98185in 5.47507in)" draw:name="Graphique 4" svg:width="1.54795in" svg:height="1.57534in" style:rel-width="scale" style:rel-height="scale">
          <draw:image xlink:href="media/image7.svg" xlink:type="simple" xlink:show="embed" xlink:actuate="onLoad"/>
          <svg:title/>
          <svg:desc>Flèche vers le bas contour</svg:desc>
        </draw:frame>
        <draw:custom-shape svg:x="14.09101in" svg:y="8.49445in" svg:width="1.77496in" svg:height="0.38035in" draw:id="id64" draw:style-name="a297" draw:name="Rectangle : coins arrondis 6">
          <svg:title/>
          <svg:desc/>
          <text:p text:style-name="a296" text:class-names="" text:cond-style-name=""><text:span text:style-name="a295" text:class-names="">5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-1.0137in" svg:y="-0.63014in" svg:width="2.54795in" svg:height="10.26027in" draw:id="id65" draw:style-name="a300" draw:name="Rectangle 7">
          <svg:title/>
          <svg:desc/>
          <text:p text:style-name="a299" text:class-names="" text:cond-style-name=""><text:span text:style-name="a2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" draw:style-name="a301" draw:master-page-name="Master1-Layout2-cust-Slide-1-master" presentation:presentation-page-layout-name="Master1-PPL2" draw:id="Slide-261">
        <draw:custom-shape svg:x="14.09101in" svg:y="8.49445in" svg:width="1.77496in" svg:height="0.38035in" draw:id="id66" draw:style-name="a304" draw:name="Rectangle : coins arrondis 2">
          <svg:title/>
          <svg:desc/>
          <text:p text:style-name="a303" text:class-names="" text:cond-style-name=""><text:span text:style-name="a302" text:class-names="">6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presentation:notes draw:style-name="a310">
          <draw:page-thumbnail draw:page-number="6" svg:x="-0.29861in" svg:y="2in" svg:width="9.59722in" svg:height="5.39931in" presentation:class="page" draw:id="id67" presentation:style-name="a305" draw:name="Slide Image Placeholder 1">
            <svg:title/>
            <svg:desc/>
          </draw:page-thumbnail>
          <draw:frame draw:id="id68" presentation:style-name="a306" draw:name="Notes Placeholder 2" svg:x="0.89931in" svg:y="7.69965in" svg:width="7.20139in" svg:height="6.30035in" presentation:class="notes" presentation:placeholder="true">
            <draw:text-box/>
            <svg:title/>
            <svg:desc/>
          </draw:frame>
          <draw:frame draw:id="id69" presentation:style-name="a309" draw:name="Slide Number Placeholder 3" svg:x="5.09722in" svg:y="15.19792in" svg:width="3.90104in" svg:height="0.80208in" presentation:class="page-number" presentation:placeholder="false">
            <draw:text-box>
              <text:p text:style-name="a308" text:class-names="" text:cond-style-name=""><text:span text:style-name="a307" text:class-names=""><text:page-number style:num-format="1" text:fixed="false">6</text:page-number></text:span></text:p>
            </draw:text-box>
            <svg:title/>
            <svg:desc/>
          </draw:frame>
        </presentation:notes>
      </draw:page>
      <draw:page draw:name="Slide7" draw:style-name="a311" draw:master-page-name="Master1-Layout2-cust-Slide-1-master" presentation:presentation-page-layout-name="Master1-PPL2" draw:id="Slide-262">
        <draw:custom-shape svg:x="0.8293in" svg:y="1.33568in" svg:width="9.08465in" svg:height="4.3026in" draw:id="id70" draw:style-name="a318" draw:name="Text 0">
          <svg:title/>
          <svg:desc/>
          <text:p text:style-name="a313" text:class-names="" text:cond-style-name=""><text:span text:style-name="a312" text:class-names="">Le Phishing :<text:s text:c="1"/></text:span></text:p>
          <text:p text:style-name="a315" text:class-names="" text:cond-style-name=""><text:span text:style-name="a314" text:class-names="">Un phénomène</text:span></text:p>
          <text:p text:style-name="a317" text:class-names="" text:cond-style-name=""><text:span text:style-name="a316" text:class-names="">en augmenta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293in" svg:y="5.99362in" svg:width="8.34141in" svg:height="1.32511in" draw:id="id71" draw:style-name="a331" draw:name="Text 1">
          <svg:title/>
          <svg:desc/>
          <text:p text:style-name="a320" text:class-names="" text:cond-style-name=""><text:span text:style-name="a319" text:class-names="">Augmentation du phishing dans des espaces publics</text:span></text:p>
          <text:p text:style-name="a322" text:class-names="" text:cond-style-name=""><text:span text:style-name="a321" text:class-names="">Amélioration du phishing à cause de l'IA</text:span></text:p>
          <text:p text:style-name="a324" text:class-names="" text:cond-style-name=""><text:span text:style-name="a323" text:class-names="">Amélioration du phishing à cause des fuites de BD</text:span></text:p>
          <text:p text:style-name="a326" text:class-names="" text:cond-style-name=""><text:span text:style-name="a325" text:class-names=""/></text:p>
          <text:p text:style-name="a328" text:class-names="" text:cond-style-name=""><text:span text:style-name="a327" text:class-names=""/></text:p>
          <text:p text:style-name="a330" text:class-names="" text:cond-style-name=""><text:span text:style-name="a3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draw:style-name="a340" draw:name="ZoneTexte 8" svg:x="10.2973in" svg:y="6.62838in" svg:width="5.4054in" svg:height="0.90879in">
          <draw:text-box>
            <text:p text:style-name="a334" text:class-names="" text:cond-style-name=""><text:span text:style-name="a332" text:class-names="">Basé sur un article publié </text:span><text:span text:style-name="a333" text:class-names=""/></text:p>
            <text:p text:style-name="a339" text:class-names="" text:cond-style-name=""><text:span text:style-name="a335" text:class-names="">par Bouygues</text:span><text:span text:style-name="a336" text:class-names=""><text:s text:c="1"/>en Janvier 2024</text:span><text:span text:style-name="a337" text:class-names="">​</text:span><text:span text:style-name="a338" text:class-names=""/></text:p>
          </draw:text-box>
          <svg:title/>
          <svg:desc/>
        </draw:frame>
        <draw:custom-shape svg:x="14.09101in" svg:y="8.49445in" svg:width="1.77496in" svg:height="0.38035in" draw:id="id73" draw:style-name="a343" draw:name="Rectangle : coins arrondis 9">
          <svg:title/>
          <svg:desc/>
          <text:p text:style-name="a342" text:class-names="" text:cond-style-name=""><text:span text:style-name="a341" text:class-names="">7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0.2984in" svg:y="2.68417in" svg:width="5.41544in" svg:height="3.64048in" draw:id="id74" draw:style-name="a346" draw:name="Rectangle 10">
          <svg:title/>
          <svg:desc/>
          <text:p text:style-name="a345" text:class-names="" text:cond-style-name=""><text:span text:style-name="a3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draw:style-name="a347" draw:name="Graphique 1" svg:x="11.34276in" svg:y="2.84896in" svg:width="3.31447in" svg:height="3.3156in" style:rel-width="scale" style:rel-height="scale">
          <draw:image xlink:href="media/image8.svg" xlink:type="simple" xlink:show="embed" xlink:actuate="onLoad"/>
          <svg:title/>
          <svg:desc/>
        </draw:frame>
        <presentation:notes draw:style-name="a353">
          <draw:page-thumbnail draw:page-number="7" svg:x="-0.29861in" svg:y="2in" svg:width="9.59722in" svg:height="5.39931in" presentation:class="page" draw:id="id76" presentation:style-name="a348" draw:name="Slide Image Placeholder 1">
            <svg:title/>
            <svg:desc/>
          </draw:page-thumbnail>
          <draw:frame draw:id="id77" presentation:style-name="a349" draw:name="Notes Placeholder 2" svg:x="0.89931in" svg:y="7.69965in" svg:width="7.20139in" svg:height="6.30035in" presentation:class="notes" presentation:placeholder="true">
            <draw:text-box/>
            <svg:title/>
            <svg:desc/>
          </draw:frame>
          <draw:frame draw:id="id78" presentation:style-name="a352" draw:name="Slide Number Placeholder 3" svg:x="5.09722in" svg:y="15.19792in" svg:width="3.90104in" svg:height="0.80208in" presentation:class="page-number" presentation:placeholder="false">
            <draw:text-box>
              <text:p text:style-name="a351" text:class-names="" text:cond-style-name=""><text:span text:style-name="a350" text:class-names=""><text:page-number style:num-format="1" text:fixed="false">7</text:page-number></text:span></text:p>
            </draw:text-box>
            <svg:title/>
            <svg:desc/>
          </draw:frame>
        </presentation:notes>
      </draw:page>
      <draw:page draw:name="Slide8" draw:style-name="a354" draw:master-page-name="Master1-Layout2-cust-Slide-1-master" presentation:presentation-page-layout-name="Master1-PPL2" draw:id="Slide-263">
        <draw:custom-shape svg:x="0.8293in" svg:y="1.33568in" svg:width="14.80929in" svg:height="1.33159in" draw:id="id79" draw:style-name="a359" draw:name="Text 0">
          <svg:title/>
          <svg:desc/>
          <text:p text:style-name="a358" text:class-names="" text:cond-style-name=""><text:span text:style-name="a355" text:class-names="">Le Phishing :<text:s text:c="1"/></text:span><text:span text:style-name="a356" text:class-names="">Un phénomène en augmentation</text:span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4814in" svg:y="2.67478in" svg:width="11.70372in" svg:height="0.67294in" draw:id="id80" draw:style-name="a369" draw:name="Text 1">
          <svg:title/>
          <svg:desc/>
          <text:p text:style-name="a362" text:class-names="" text:cond-style-name=""><text:span text:style-name="a360" text:class-names="">L'utilisation du wifi public et ses failles : le jumeau maléfique</text:span><text:span text:style-name="a361" text:class-names=""/></text:p>
          <text:p text:style-name="a364" text:class-names="" text:cond-style-name=""><text:span text:style-name="a363" text:class-names=""/></text:p>
          <text:p text:style-name="a366" text:class-names="" text:cond-style-name=""><text:span text:style-name="a365" text:class-names=""/></text:p>
          <text:p text:style-name="a368" text:class-names="" text:cond-style-name=""><text:span text:style-name="a3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4.09101in" svg:y="8.49445in" svg:width="1.77496in" svg:height="0.38035in" draw:id="id81" draw:style-name="a372" draw:name="Rectangle : coins arrondis 9">
          <svg:title/>
          <svg:desc/>
          <text:p text:style-name="a371" text:class-names="" text:cond-style-name=""><text:span text:style-name="a370" text:class-names="">8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82" draw:style-name="a373" draw:name="Image 1" svg:x="3.39855in" svg:y="3.64427in" svg:width="9.69565in" svg:height="4.40711in" style:rel-width="scale" style:rel-height="scale">
          <draw:image xlink:href="media/image9.png" xlink:type="simple" xlink:show="embed" xlink:actuate="onLoad"/>
          <svg:title/>
          <svg:desc>Evil Twin Attacks</svg:desc>
        </draw:frame>
        <presentation:notes draw:style-name="a379">
          <draw:page-thumbnail draw:page-number="8" svg:x="-0.29861in" svg:y="2in" svg:width="9.59722in" svg:height="5.39931in" presentation:class="page" draw:id="id83" presentation:style-name="a374" draw:name="Slide Image Placeholder 1">
            <svg:title/>
            <svg:desc/>
          </draw:page-thumbnail>
          <draw:frame draw:id="id84" presentation:style-name="a375" draw:name="Notes Placeholder 2" svg:x="0.89931in" svg:y="7.69965in" svg:width="7.20139in" svg:height="6.30035in" presentation:class="notes" presentation:placeholder="true">
            <draw:text-box/>
            <svg:title/>
            <svg:desc/>
          </draw:frame>
          <draw:frame draw:id="id85" presentation:style-name="a378" draw:name="Slide Number Placeholder 3" svg:x="5.09722in" svg:y="15.19792in" svg:width="3.90104in" svg:height="0.80208in" presentation:class="page-number" presentation:placeholder="false">
            <draw:text-box>
              <text:p text:style-name="a377" text:class-names="" text:cond-style-name=""><text:span text:style-name="a376" text:class-names=""><text:page-number style:num-format="1" text:fixed="false">8</text:page-number></text:span></text:p>
            </draw:text-box>
            <svg:title/>
            <svg:desc/>
          </draw:frame>
        </presentation:notes>
      </draw:page>
      <draw:page draw:name="Slide9" draw:style-name="a380" draw:master-page-name="Master1-Layout2-cust-Slide-1-master" presentation:presentation-page-layout-name="Master1-PPL2" draw:id="Slide-264">
        <draw:custom-shape svg:x="0.8293in" svg:y="1.33568in" svg:width="14.80929in" svg:height="1.33159in" draw:id="id86" draw:style-name="a385" draw:name="Text 0">
          <svg:title/>
          <svg:desc/>
          <text:p text:style-name="a384" text:class-names="" text:cond-style-name=""><text:span text:style-name="a381" text:class-names="">Le Phishing :<text:s text:c="1"/></text:span><text:span text:style-name="a382" text:class-names="">Un phénomène en augmentation</text:span><text:span text:style-name="a3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4814in" svg:y="2.67478in" svg:width="11.70372in" svg:height="0.67294in" draw:id="id87" draw:style-name="a389" draw:name="Text 1">
          <svg:title/>
          <svg:desc/>
          <text:p text:style-name="a388" text:class-names="" text:cond-style-name=""><text:span text:style-name="a386" text:class-names="">Comment s'en protéger : les mesures de sécurité</text:span><text:span text:style-name="a3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4.09101in" svg:y="8.49445in" svg:width="1.77496in" svg:height="0.38035in" draw:id="id88" draw:style-name="a392" draw:name="Rectangle : coins arrondis 9">
          <svg:title/>
          <svg:desc/>
          <text:p text:style-name="a391" text:class-names="" text:cond-style-name=""><text:span text:style-name="a390" text:class-names="">9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2.49596in" svg:y="4.34145in" svg:width="11.00807in" svg:height="2.9483in" draw:id="id89" draw:style-name="a422" draw:name="Text 1">
          <svg:title/>
          <svg:desc/>
          <text:list text:style-name="a398">
            <text:list-item>
              <text:p text:style-name="a397" text:class-names="" text:cond-style-name=""><text:span text:style-name="a393" text:class-names="">N'utiliser</text:span><text:span text:style-name="a394" text:class-names=""><text:s text:c="1"/>que des réseaux<text:s text:c="1"/></text:span><text:span text:style-name="a395" text:class-names="">familiers</text:span><text:span text:style-name="a396" text:class-names=""/></text:p>
            </text:list-item>
          </text:list>
          <text:list text:style-name="a401">
            <text:list-item>
              <text:p text:style-name="a400" text:class-names="" text:cond-style-name=""><text:span text:style-name="a399" text:class-names=""/></text:p>
            </text:list-item>
          </text:list>
          <text:list text:style-name="a406">
            <text:list-item>
              <text:p text:style-name="a405" text:class-names="" text:cond-style-name=""><text:span text:style-name="a402" text:class-names="">Utiliser</text:span><text:span text:style-name="a403" text:class-names=""><text:s text:c="1"/>un VPN</text:span><text:span text:style-name="a404" text:class-names=""/></text:p>
            </text:list-item>
          </text:list>
          <text:list text:style-name="a409">
            <text:list-item>
              <text:p text:style-name="a408" text:class-names="" text:cond-style-name=""><text:span text:style-name="a407" text:class-names=""/></text:p>
            </text:list-item>
          </text:list>
          <text:list text:style-name="a413">
            <text:list-item>
              <text:p text:style-name="a412" text:class-names="" text:cond-style-name=""><text:span text:style-name="a410" text:class-names="">Naviguer</text:span><text:span text:style-name="a411" text:class-names=""><text:s text:c="1"/>sur des sites HTTPS</text:span></text:p>
            </text:list-item>
          </text:list>
          <text:list text:style-name="a416">
            <text:list-item>
              <text:p text:style-name="a415" text:class-names="" text:cond-style-name=""><text:span text:style-name="a414" text:class-names=""/></text:p>
            </text:list-item>
          </text:list>
          <text:list text:style-name="a421">
            <text:list-item>
              <text:p text:style-name="a420" text:class-names="" text:cond-style-name=""><text:span text:style-name="a417" text:class-names="">Utiliser</text:span><text:span text:style-name="a418" text:class-names=""><text:s text:c="1"/>l'A2F</text:span><text:span text:style-name="a419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428">
          <draw:page-thumbnail draw:page-number="9" svg:x="-0.29861in" svg:y="2in" svg:width="9.59722in" svg:height="5.39931in" presentation:class="page" draw:id="id90" presentation:style-name="a423" draw:name="Slide Image Placeholder 1">
            <svg:title/>
            <svg:desc/>
          </draw:page-thumbnail>
          <draw:frame draw:id="id91" presentation:style-name="a424" draw:name="Notes Placeholder 2" svg:x="0.89931in" svg:y="7.69965in" svg:width="7.20139in" svg:height="6.30035in" presentation:class="notes" presentation:placeholder="true">
            <draw:text-box/>
            <svg:title/>
            <svg:desc/>
          </draw:frame>
          <draw:frame draw:id="id92" presentation:style-name="a427" draw:name="Slide Number Placeholder 3" svg:x="5.09722in" svg:y="15.19792in" svg:width="3.90104in" svg:height="0.80208in" presentation:class="page-number" presentation:placeholder="false">
            <draw:text-box>
              <text:p text:style-name="a426" text:class-names="" text:cond-style-name=""><text:span text:style-name="a425" text:class-names=""><text:page-number style:num-format="1" text:fixed="false">9</text:page-number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EFAULT"/>
    <style:presentation-page-layout style:name="Master1-PPL2" style:display-name="Slide 1 master"/>
    <style:presentation-page-layout style:name="Master1-PPL3" style:display-name="Slide 2 master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6in" fo:page-height="9in" style:print-orientation="landscape" style:register-truth-ref-style-name=""/>
    </style:page-layout>
    <style:page-layout style:name="pageLayout2">
      <style:page-layout-properties fo:page-width="9in" fo:page-height="16in" style:print-orientation="portrait" style:register-truth-ref-style-name=""/>
    </style:page-layout>
    <style:page-layout style:name="pageLayout3">
      <style:page-layout-properties fo:page-width="9in" fo:page-height="16in" style:print-orientation="portrait" style:register-truth-ref-style-name=""/>
    </style:page-layout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 style:parent-style-name="Graphics">
      <style:graphic-properties draw:fill="none" draw:stroke="none"/>
    </style:style>
    <style:style style:family="graphic" style:name="a101">
      <style:graphic-properties draw:fill="solid" draw:fill-color="#0a0a0a" draw:opacity="95%" draw:stroke="none"/>
    </style:style>
    <style:style style:family="paragraph" style:name="a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 style:parent-style-name="Graphics">
      <style:graphic-properties draw:fill="none" draw:stroke="none"/>
    </style:style>
    <style:style style:family="presentation" style:name="a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" style:parent-style-name="Graphics">
      <style:graphic-properties draw:fill="none" draw:stroke="none"/>
    </style:style>
    <style:style style:family="graphic" style:name="a66">
      <style:graphic-properties draw:fill="solid" draw:fill-color="#0a0a0a" draw:opacity="95%" draw:stroke="none"/>
    </style:style>
    <style:style style:family="graphic" style:name="a67" style:parent-style-name="Graphics">
      <style:graphic-properties draw:fill="none" draw:stroke="non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presentation:notes style:page-layout-name="pageLayout2" draw:style-name="a31">
        <draw:frame draw:id="id0" presentation:style-name="a3" draw:name="Espace réservé de l'en-tête 1" svg:x="0in" svg:y="0in" svg:width="3.89931in" svg:height="0.80208in" presentation:class="header" presentation:placeholder="false">
          <draw:text-box>
            <text:p text:style-name="a2" text:class-names="" text:cond-style-name=""><text:span text:style-name="a1" text:class-names=""/></text:p>
          </draw:text-box>
          <svg:title/>
          <svg:desc/>
        </draw:frame>
        <draw:frame draw:id="id1" presentation:style-name="a7" draw:name="Espace réservé de la date 2" svg:x="5.09722in" svg:y="0in" svg:width="3.90104in" svg:height="0.80208in" presentation:class="date-time" presentation:placeholder="false">
          <draw:text-box>
            <text:p text:style-name="a6" text:class-names="" text:cond-style-name=""><text:span text:style-name="a4" text:class-names=""><text:date text:fixed="false" style:data-style-name="a5">20/11/2024</text:date></text:span></text:p>
          </draw:text-box>
          <svg:title/>
          <svg:desc/>
        </draw:frame>
        <draw:page-thumbnail svg:x="-0.29861in" svg:y="2in" svg:width="9.59722in" svg:height="5.39931in" presentation:class="page" draw:id="id2" presentation:style-name="a8" draw:name="Espace réservé de l'image des diapositives 3">
          <svg:title/>
          <svg:desc/>
        </draw:page-thumbnail>
        <draw:frame draw:id="id3" presentation:style-name="a23" draw:name="Espace réservé des notes 4" svg:x="0.89931in" svg:y="7.69965in" svg:width="7.20139in" svg:height="6.30035in" presentation:class="notes" presentation:placeholder="false">
          <draw:text-box>
            <text:p text:style-name="a10" text:class-names="" text:cond-style-name=""><text:span text:style-name="a9" text:class-names="">Cliquez pour modifier les styles du texte du masque</text:span></text:p>
            <text:list text:style-name="a13">
              <text:list-item>
                <text:list text:style-name="a13">
                  <text:list-item>
                    <text:p text:style-name="a12" text:class-names="" text:cond-style-name=""><text:span text:style-name="a11" text:class-names="">Deuxième niveau</text:span></text:p>
                  </text:list-item>
                </text:list>
              </text:list-item>
            </text:list>
            <text:list text:style-name="a16">
              <text:list-item>
                <text:list text:style-name="a16">
                  <text:list-item>
                    <text:list text:style-name="a16">
                      <text:list-item>
                        <text:p text:style-name="a15" text:class-names="" text:cond-style-name=""><text:span text:style-name="a1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9">
              <text:list-item>
                <text:list text:style-name="a19">
                  <text:list-item>
                    <text:list text:style-name="a19">
                      <text:list-item>
                        <text:list text:style-name="a19">
                          <text:list-item>
                            <text:p text:style-name="a18" text:class-names="" text:cond-style-name=""><text:span text:style-name="a1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">
              <text:list-item>
                <text:list text:style-name="a22">
                  <text:list-item>
                    <text:list text:style-name="a22">
                      <text:list-item>
                        <text:list text:style-name="a22">
                          <text:list-item>
                            <text:list text:style-name="a22">
                              <text:list-item>
                                <text:p text:style-name="a21" text:class-names="" text:cond-style-name=""><text:span text:style-name="a2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26" draw:name="Espace réservé du pied de page 5" svg:x="0in" svg:y="15.19792in" svg:width="3.89931in" svg:height="0.80208in" presentation:class="footer" presentation:placeholder="false">
          <draw:text-box>
            <text:p text:style-name="a25" text:class-names="" text:cond-style-name=""><text:span text:style-name="a24" text:class-names=""/></text:p>
          </draw:text-box>
          <svg:title/>
          <svg:desc/>
        </draw:frame>
        <draw:frame draw:id="id5" presentation:style-name="a30" draw:name="Espace réservé du numéro de diapositive 6" svg:x="5.09722in" svg:y="15.19792in" svg:width="3.90104in" svg:height="0.80208in" presentation:class="page-number" presentation:placeholder="false">
          <draw:text-box>
            <text:p text:style-name="a29" text:class-names="" text:cond-style-name=""><text:span text:style-name="a27" text:class-names=""><text:page-number style:num-format="1" text:fixed="false">‹N°›</text:page-number></text:span><text:span text:style-name="a28" text:class-names=""/></text:p>
          </draw:text-box>
          <svg:title/>
          <svg:desc/>
        </draw:frame>
      </presentation:notes>
    </style:master-page>
    <style:master-page style:name="Master1-Layout1-cust-DEFAULT" style:page-layout-name="pageLayout1" draw:style-name="a32">
      <presentation:notes style:page-layout-name="pageLayout2" draw:style-name="a63">
        <draw:frame draw:id="id0" presentation:style-name="a35" draw:name="Espace réservé de l'en-tête 1" svg:x="0in" svg:y="0in" svg:width="3.89931in" svg:height="0.80208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1" presentation:style-name="a39" draw:name="Espace réservé de la date 2" svg:x="5.09722in" svg:y="0in" svg:width="3.90104in" svg:height="0.80208in" presentation:class="date-time" presentation:placeholder="false">
          <draw:text-box>
            <text:p text:style-name="a38" text:class-names="" text:cond-style-name=""><text:span text:style-name="a36" text:class-names=""><text:date text:fixed="false" style:data-style-name="a37">20/11/2024</text:date></text:span></text:p>
          </draw:text-box>
          <svg:title/>
          <svg:desc/>
        </draw:frame>
        <draw:page-thumbnail svg:x="-0.29861in" svg:y="2in" svg:width="9.59722in" svg:height="5.39931in" presentation:class="page" draw:id="id2" presentation:style-name="a40" draw:name="Espace réservé de l'image des diapositives 3">
          <svg:title/>
          <svg:desc/>
        </draw:page-thumbnail>
        <draw:frame draw:id="id3" presentation:style-name="a55" draw:name="Espace réservé des notes 4" svg:x="0.89931in" svg:y="7.69965in" svg:width="7.20139in" svg:height="6.30035in" presentation:class="notes" presentation:placeholder="false">
          <draw:text-box>
            <text:p text:style-name="a42" text:class-names="" text:cond-style-name=""><text:span text:style-name="a41" text:class-names="">Cliquez pour modifier les styles du texte du masque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Deuxième niveau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58" draw:name="Espace réservé du pied de page 5" svg:x="0in" svg:y="15.19792in" svg:width="3.89931in" svg:height="0.80208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5" presentation:style-name="a62" draw:name="Espace réservé du numéro de diapositive 6" svg:x="5.09722in" svg:y="15.19792in" svg:width="3.90104in" svg:height="0.80208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N°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2-cust-Slide-1-master" style:page-layout-name="pageLayout1" draw:style-name="a64">
      <draw:frame draw:id="id6" draw:style-name="a65" draw:name="Image 0" svg:x="0in" svg:y="0in" svg:width="16in" svg:height="9in" style:rel-width="scale" style:rel-height="scale">
        <draw:image xlink:href="media/image10.png" xlink:type="simple" xlink:show="embed" xlink:actuate="onLoad"/>
        <svg:title/>
        <svg:desc>preencoded.png</svg:desc>
      </draw:frame>
      <draw:custom-shape svg:x="0in" svg:y="0in" svg:width="16in" svg:height="9in" draw:id="id7" draw:style-name="a66" draw:name="Shape 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" draw:style-name="a67" draw:name="Image 1" svg:x="14.04114in" svg:y="8.475in" svg:width="1.88386in" svg:height="0.45in" style:rel-width="scale" style:rel-height="scale">
        <draw:image xlink:href="media/image11.png" xlink:type="simple" xlink:show="embed" xlink:actuate="onLoad"/>
        <office:event-listeners>
          <presentation:event-listener xmlns:script="urn:oasis:names:tc:opendocument:xmlns:script:1.0" script:event-name="dom:click" presentation:action="show" xlink:href="https://gamma.app/?utm_source=made-with-gamma" xlink:type="simple" xlink:show="embed" xlink:actuate="onRequest"/>
        </office:event-listeners>
        <svg:title/>
        <svg:desc>preencoded.png</svg:desc>
      </draw:frame>
      <presentation:notes style:page-layout-name="pageLayout2" draw:style-name="a98">
        <draw:frame draw:id="id0" presentation:style-name="a70" draw:name="Espace réservé de l'en-tête 1" svg:x="0in" svg:y="0in" svg:width="3.89931in" svg:height="0.80208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1" presentation:style-name="a74" draw:name="Espace réservé de la date 2" svg:x="5.09722in" svg:y="0in" svg:width="3.90104in" svg:height="0.80208in" presentation:class="date-time" presentation:placeholder="false">
          <draw:text-box>
            <text:p text:style-name="a73" text:class-names="" text:cond-style-name=""><text:span text:style-name="a71" text:class-names=""><text:date text:fixed="false" style:data-style-name="a72">20/11/2024</text:date></text:span></text:p>
          </draw:text-box>
          <svg:title/>
          <svg:desc/>
        </draw:frame>
        <draw:page-thumbnail svg:x="-0.29861in" svg:y="2in" svg:width="9.59722in" svg:height="5.39931in" presentation:class="page" draw:id="id2" presentation:style-name="a75" draw:name="Espace réservé de l'image des diapositives 3">
          <svg:title/>
          <svg:desc/>
        </draw:page-thumbnail>
        <draw:frame draw:id="id3" presentation:style-name="a90" draw:name="Espace réservé des notes 4" svg:x="0.89931in" svg:y="7.69965in" svg:width="7.20139in" svg:height="6.30035in" presentation:class="notes" presentation:placeholder="false">
          <draw:text-box>
            <text:p text:style-name="a77" text:class-names="" text:cond-style-name=""><text:span text:style-name="a76" text:class-names="">Cliquez pour modifier les styles du texte du masque</text:span></text:p>
            <text:list text:style-name="a80">
              <text:list-item>
                <text:list text:style-name="a80">
                  <text:list-item>
                    <text:p text:style-name="a79" text:class-names="" text:cond-style-name=""><text:span text:style-name="a78" text:class-names="">Deuxième niveau</text:span></text:p>
                  </text:list-item>
                </text:list>
              </text:list-item>
            </text:list>
            <text:list text:style-name="a83">
              <text:list-item>
                <text:list text:style-name="a83">
                  <text:list-item>
                    <text:list text:style-name="a83">
                      <text:list-item>
                        <text:p text:style-name="a82" text:class-names="" text:cond-style-name=""><text:span text:style-name="a8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6">
              <text:list-item>
                <text:list text:style-name="a86">
                  <text:list-item>
                    <text:list text:style-name="a86">
                      <text:list-item>
                        <text:list text:style-name="a86">
                          <text:list-item>
                            <text:p text:style-name="a85" text:class-names="" text:cond-style-name=""><text:span text:style-name="a8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">
              <text:list-item>
                <text:list text:style-name="a89">
                  <text:list-item>
                    <text:list text:style-name="a89">
                      <text:list-item>
                        <text:list text:style-name="a89">
                          <text:list-item>
                            <text:list text:style-name="a89">
                              <text:list-item>
                                <text:p text:style-name="a88" text:class-names="" text:cond-style-name=""><text:span text:style-name="a8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93" draw:name="Espace réservé du pied de page 5" svg:x="0in" svg:y="15.19792in" svg:width="3.89931in" svg:height="0.80208in" presentation:class="foot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5" presentation:style-name="a97" draw:name="Espace réservé du numéro de diapositive 6" svg:x="5.09722in" svg:y="15.19792in" svg:width="3.90104in" svg:height="0.80208in" presentation:class="page-number" presentation:placeholder="false">
          <draw:text-box>
            <text:p text:style-name="a96" text:class-names="" text:cond-style-name=""><text:span text:style-name="a94" text:class-names=""><text:page-number style:num-format="1" text:fixed="false">‹N°›</text:page-number></text:span><text:span text:style-name="a95" text:class-names=""/></text:p>
          </draw:text-box>
          <svg:title/>
          <svg:desc/>
        </draw:frame>
      </presentation:notes>
    </style:master-page>
    <style:master-page style:name="Master1-Layout3-cust-Slide-2-master" style:page-layout-name="pageLayout1" draw:style-name="a99">
      <draw:frame draw:id="id9" draw:style-name="a100" draw:name="Image 0" svg:x="0in" svg:y="0in" svg:width="16in" svg:height="9in" style:rel-width="scale" style:rel-height="scale">
        <draw:image xlink:href="media/image10.png" xlink:type="simple" xlink:show="embed" xlink:actuate="onLoad"/>
        <svg:title/>
        <svg:desc>preencoded.png</svg:desc>
      </draw:frame>
      <draw:custom-shape svg:x="0in" svg:y="0in" svg:width="16in" svg:height="9in" draw:id="id10" draw:style-name="a101" draw:name="Shape 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" draw:style-name="a102" draw:name="Image 1" svg:x="14.04114in" svg:y="8.475in" svg:width="1.88386in" svg:height="0.45in" style:rel-width="scale" style:rel-height="scale">
        <draw:image xlink:href="media/image11.png" xlink:type="simple" xlink:show="embed" xlink:actuate="onLoad"/>
        <office:event-listeners>
          <presentation:event-listener xmlns:script="urn:oasis:names:tc:opendocument:xmlns:script:1.0" script:event-name="dom:click" presentation:action="show" xlink:href="https://gamma.app/?utm_source=made-with-gamma" xlink:type="simple" xlink:show="embed" xlink:actuate="onRequest"/>
        </office:event-listeners>
        <svg:title/>
        <svg:desc>preencoded.png</svg:desc>
      </draw:frame>
      <presentation:notes style:page-layout-name="pageLayout2" draw:style-name="a133">
        <draw:frame draw:id="id0" presentation:style-name="a105" draw:name="Espace réservé de l'en-tête 1" svg:x="0in" svg:y="0in" svg:width="3.89931in" svg:height="0.80208in" presentation:class="head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1" presentation:style-name="a109" draw:name="Espace réservé de la date 2" svg:x="5.09722in" svg:y="0in" svg:width="3.90104in" svg:height="0.80208in" presentation:class="date-time" presentation:placeholder="false">
          <draw:text-box>
            <text:p text:style-name="a108" text:class-names="" text:cond-style-name=""><text:span text:style-name="a106" text:class-names=""><text:date text:fixed="false" style:data-style-name="a107">20/11/2024</text:date></text:span></text:p>
          </draw:text-box>
          <svg:title/>
          <svg:desc/>
        </draw:frame>
        <draw:page-thumbnail svg:x="-0.29861in" svg:y="2in" svg:width="9.59722in" svg:height="5.39931in" presentation:class="page" draw:id="id2" presentation:style-name="a110" draw:name="Espace réservé de l'image des diapositives 3">
          <svg:title/>
          <svg:desc/>
        </draw:page-thumbnail>
        <draw:frame draw:id="id3" presentation:style-name="a125" draw:name="Espace réservé des notes 4" svg:x="0.89931in" svg:y="7.69965in" svg:width="7.20139in" svg:height="6.30035in" presentation:class="notes" presentation:placeholder="false">
          <draw:text-box>
            <text:p text:style-name="a112" text:class-names="" text:cond-style-name=""><text:span text:style-name="a111" text:class-names="">Cliquez pour modifier les styles du texte du masque</text:span></text:p>
            <text:list text:style-name="a115">
              <text:list-item>
                <text:list text:style-name="a115">
                  <text:list-item>
                    <text:p text:style-name="a114" text:class-names="" text:cond-style-name=""><text:span text:style-name="a113" text:class-names="">Deuxième niveau</text:span></text:p>
                  </text:list-item>
                </text:list>
              </text:list-item>
            </text:list>
            <text:list text:style-name="a118">
              <text:list-item>
                <text:list text:style-name="a118">
                  <text:list-item>
                    <text:list text:style-name="a118">
                      <text:list-item>
                        <text:p text:style-name="a117" text:class-names="" text:cond-style-name=""><text:span text:style-name="a11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1">
              <text:list-item>
                <text:list text:style-name="a121">
                  <text:list-item>
                    <text:list text:style-name="a121">
                      <text:list-item>
                        <text:list text:style-name="a121">
                          <text:list-item>
                            <text:p text:style-name="a120" text:class-names="" text:cond-style-name=""><text:span text:style-name="a11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list text:style-name="a124">
                          <text:list-item>
                            <text:list text:style-name="a124">
                              <text:list-item>
                                <text:p text:style-name="a123" text:class-names="" text:cond-style-name=""><text:span text:style-name="a12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128" draw:name="Espace réservé du pied de page 5" svg:x="0in" svg:y="15.19792in" svg:width="3.89931in" svg:height="0.80208in" presentation:class="footer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5" presentation:style-name="a132" draw:name="Espace réservé du numéro de diapositive 6" svg:x="5.09722in" svg:y="15.19792in" svg:width="3.90104in" svg:height="0.80208in" presentation:class="page-number" presentation:placeholder="false">
          <draw:text-box>
            <text:p text:style-name="a131" text:class-names="" text:cond-style-name=""><text:span text:style-name="a129" text:class-names=""><text:page-number style:num-format="1" text:fixed="false">‹N°›</text:page-number></text:span><text:span text:style-name="a130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ptxGenJS Presentation</dc:title>
    <dc:subject>PptxGenJS Presentation</dc:subject>
    <meta:initial-creator>PptxGenJS</meta:initial-creator>
    <meta:creation-date>2024-11-20T17:20:38Z</meta:creation-date>
    <dc:date>2024-11-27T18:06:26Z</dc:date>
    <meta:editing-cycles>285</meta:editing-cycles>
  </office:meta>
</office:document-meta>
</file>